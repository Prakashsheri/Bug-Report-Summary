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Arial" svg:font-family="Arial" style:font-family-generic="swis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8.804cm"/>
    </style:style>
    <style:style style:name="co3" style:family="table-column">
      <style:table-column-properties fo:break-before="auto" style:column-width="15.386cm"/>
    </style:style>
    <style:style style:name="co4" style:family="table-column">
      <style:table-column-properties fo:break-before="auto" style:column-width="16.665cm"/>
    </style:style>
    <style:style style:name="co5" style:family="table-column">
      <style:table-column-properties fo:break-before="auto" style:column-width="13.217cm"/>
    </style:style>
    <style:style style:name="co6" style:family="table-column">
      <style:table-column-properties fo:break-before="auto" style:column-width="15.032cm"/>
    </style:style>
    <style:style style:name="co7" style:family="table-column">
      <style:table-column-properties fo:break-before="auto" style:column-width="2.649cm"/>
    </style:style>
    <style:style style:name="co8" style:family="table-column">
      <style:table-column-properties fo:break-before="auto" style:column-width="2.75cm"/>
    </style:style>
    <style:style style:name="co9" style:family="table-column">
      <style:table-column-properties fo:break-before="auto" style:column-width="2.505cm"/>
    </style:style>
    <style:style style:name="co10" style:family="table-column">
      <style:table-column-properties fo:break-before="auto" style:column-width="3.431cm"/>
    </style:style>
    <style:style style:name="co11" style:family="table-column">
      <style:table-column-properties fo:break-before="auto" style:column-width="3.757cm"/>
    </style:style>
    <style:style style:name="co12" style:family="table-column">
      <style:table-column-properties fo:break-before="auto" style:column-width="2.477cm"/>
    </style:style>
    <style:style style:name="co13" style:family="table-column">
      <style:table-column-properties fo:break-before="auto" style:column-width="5.673cm"/>
    </style:style>
    <style:style style:name="co14" style:family="table-column">
      <style:table-column-properties fo:break-before="auto" style:column-width="4.42cm"/>
    </style:style>
    <style:style style:name="co15" style:family="table-column">
      <style:table-column-properties fo:break-before="auto" style:column-width="2.258cm"/>
    </style:style>
    <style:style style:name="ro1" style:family="table-row">
      <style:table-row-properties style:row-height="1.027cm" fo:break-before="auto" style:use-optimal-row-height="false"/>
    </style:style>
    <style:style style:name="ro2" style:family="table-row">
      <style:table-row-properties style:row-height="3.053cm" fo:break-before="auto" style:use-optimal-row-height="false"/>
    </style:style>
    <style:style style:name="ro3" style:family="table-row">
      <style:table-row-properties style:row-height="3.844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4.263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60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8.502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3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7.213cm" fo:break-before="auto" style:use-optimal-row-height="true"/>
    </style:style>
    <style:style style:name="ro15" style:family="table-row">
      <style:table-row-properties style:row-height="1.053cm" fo:break-before="auto" style:use-optimal-row-height="false"/>
    </style:style>
    <style:style style:name="ro16" style:family="table-row">
      <style:table-row-properties style:row-height="0.894cm" fo:break-before="auto" style:use-optimal-row-height="false"/>
    </style:style>
    <style:style style:name="ro17" style:family="table-row">
      <style:table-row-properties style:row-height="0.947cm" fo:break-before="auto" style:use-optimal-row-height="false"/>
    </style:style>
    <style:style style:name="ro18" style:family="table-row">
      <style:table-row-properties style:row-height="0.841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0.815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2" style:family="table-cell" style:parent-style-name="Default">
      <style:table-cell-properties fo:background-color="#ffff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37" style:family="table-cell" style:parent-style-name="Default">
      <style:table-cell-properties style:text-align-source="fix" style:repeat-content="false" fo:background-color="transparent" fo:border="0.06pt solid #000000" style:vertical-align="top"/>
      <style:paragraph-properties fo:text-align="start"/>
      <style:text-properties style:font-name="Calibri" fo:font-size="12pt" style:font-size-asian="12pt" style:font-size-complex="12pt"/>
    </style:style>
    <style:style style:name="ce38" style:family="table-cell" style:parent-style-name="Default">
      <style:table-cell-properties fo:background-color="transparent" fo:border="0.06pt solid #000000" style:vertical-align="top"/>
      <style:text-properties style:font-name="Calibri" fo:font-size="12pt" style:font-size-asian="12pt" style:font-size-complex="12pt"/>
    </style:style>
    <style:style style:name="ce39" style:family="table-cell" style:parent-style-name="Default">
      <style:text-properties style:font-name="Calibri" fo:font-size="12pt" style:font-size-asian="12pt" style:font-size-complex="12pt"/>
    </style:style>
    <style:style style:name="ce40"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language="none" fo:country="none" fo:font-style="normal" fo:text-shadow="none" style:text-underline-style="none" fo:font-weight="normal" style:font-name-asian="Consolas" style:font-size-asian="12pt" style:language-asian="none" style:country-asian="none" style:font-style-asian="normal" style:font-weight-asian="normal" style:font-name-complex="Consolas" style:font-size-complex="12pt" style:language-complex="none" style:country-complex="none" style:font-style-complex="normal" style:font-weight-complex="normal"/>
    </style:style>
    <style:style style:name="ce41" style:family="table-cell" style:parent-style-name="Default">
      <style:table-cell-properties fo:border="0.06pt solid #000000" style:vertical-align="top"/>
      <style:text-properties style:font-name="Calibri" fo:font-size="12pt" style:font-size-asian="12pt" style:font-size-complex="12pt"/>
    </style:style>
    <style:style style:name="ce42" style:family="table-cell" style:parent-style-name="Default">
      <style:table-cell-properties style:text-align-source="fix" style:repeat-content="false" fo:border="0.06pt solid #000000" style:vertical-align="top"/>
      <style:paragraph-properties fo:text-align="start" fo:margin-left="0cm"/>
      <style:text-properties style:font-name="Calibri" fo:font-size="12pt" style:font-size-asian="12pt" style:font-size-complex="12pt"/>
    </style:style>
    <style:style style:name="ce43" style:family="table-cell" style:parent-style-name="Default">
      <style:table-cell-properties fo:border="0.06pt solid #000000"/>
      <style:text-properties style:font-name="Calibri" fo:font-size="12pt" style:font-size-asian="12pt" style:font-size-complex="12pt"/>
    </style:style>
    <style:style style:name="ce44"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5"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7" style:family="table-cell" style:parent-style-name="Default">
      <style:table-cell-properties fo:background-color="#ffff00" style:text-align-source="fix" style:repeat-content="false" fo:border="0.06pt solid #000000" style:vertical-align="top"/>
      <style:paragraph-properties fo:text-align="start"/>
      <style:text-properties style:font-name="Calibri" fo:font-size="12pt" style:font-size-asian="12pt" style:font-size-complex="12pt"/>
    </style:style>
    <style:style style:name="ce48" style:family="table-cell" style:parent-style-name="Default">
      <style:table-cell-properties style:text-align-source="fix" style:repeat-content="false" fo:background-color="transparent" fo:border="0.06pt solid #000000" style:vertical-align="top"/>
      <style:paragraph-properties fo:text-align="start"/>
      <style:text-properties style:font-name="Calibri" fo:font-size="12pt" fo:font-weight="normal" style:font-size-asian="12pt" style:font-weight-asian="normal" style:font-size-complex="12pt" style:font-weight-complex="normal"/>
    </style:style>
    <style:style style:name="ce1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ormal">
      <style:table-cell-properties fo:background-color="#ffff00"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50"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1" style:family="table-cell" style:parent-style-name="Default">
      <style:table-cell-properties style:text-align-source="fix" style:repeat-content="false" fo:border="0.06pt solid #000000" style:vertical-align="top"/>
      <style:paragraph-properties fo:text-align="start"/>
      <style:text-properties style:font-name="Calibri" fo:font-size="12pt" style:font-size-asian="12pt" style:font-size-complex="12pt"/>
    </style:style>
    <style:style style:name="ce52" style:family="table-cell" style:parent-style-name="Default">
      <style:table-cell-properties fo:border="0.06pt solid #000000" style:vertical-align="top"/>
      <style:text-properties style:font-name="Calibri" fo:font-size="12pt" style:font-size-asian="12pt" style:font-name-complex="Arial" style:font-size-complex="12pt"/>
    </style:style>
    <style:style style:name="ce53" style:family="table-cell" style:parent-style-name="Default" style:data-style-name="N41">
      <style:table-cell-properties style:text-align-source="fix" style:repeat-content="false" fo:border="0.06pt solid #000000" style:vertical-align="top"/>
      <style:paragraph-properties fo:text-align="start" fo:margin-left="0cm"/>
      <style:text-properties style:font-name="Calibri" fo:font-size="12pt" style:font-size-asian="12pt" style:font-size-complex="12pt"/>
    </style:style>
    <style:style style:name="ce54" style:family="table-cell" style:parent-style-name="Default">
      <style:table-cell-properties style:text-align-source="fix" style:repeat-content="false" fo:border="0.06pt solid #000000" style:vertical-align="top"/>
      <style:paragraph-properties fo:text-align="start"/>
      <style:text-properties style:font-name="Calibri" fo:font-size="12pt" style:font-size-asian="12pt" style:font-name-complex="Arial" style:font-size-complex="12pt"/>
    </style:style>
    <style:style style:name="ce20" style:family="table-cell" style:parent-style-name="Default">
      <style:table-cell-properties style:text-align-source="fix" style:repeat-content="false" fo:border="0.06pt solid #000000" style:vertical-align="top"/>
      <style:paragraph-properties fo:text-align="start" fo:margin-left="0cm"/>
      <style:text-properties style:font-name="Calibri" fo:font-size="12pt" style:font-size-asian="12pt" style:font-name-complex="Arial" style:font-size-complex="12pt"/>
    </style:style>
    <style:style style:name="ce26" style:family="table-cell" style:parent-style-name="Default">
      <style:table-cell-properties fo:background-color="#ffff00" style:diagonal-bl-tr="none" style:diagonal-tl-br="none" style:text-align-source="fix" style:repeat-content="false" fo:wrap-option="wrap" fo:border="0.06pt solid #000000"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56" style:family="table-cell" style:parent-style-name="Default">
      <style:table-cell-properties fo:background-color="transparent" fo:border="0.06pt solid #000000"/>
      <style:text-properties style:font-name="Calibri" fo:font-size="12pt" style:font-size-asian="12pt" style:font-size-complex="12pt"/>
    </style:style>
    <style:style style:name="ce57"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8" style:family="table-cell" style:parent-style-name="Default">
      <style:table-cell-properties fo:background-color="transparent"/>
      <style:text-properties style:font-name="Calibri" fo:font-size="12pt" style:font-size-asian="12pt" style:font-size-complex="12pt"/>
    </style:style>
    <style:style style:name="ce31" style:family="table-cell" style:parent-style-name="Default">
      <style:table-cell-properties fo:background-color="#ffff00"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0" style:family="table-cell" style:parent-style-name="Default" style:data-style-name="N84">
      <style:table-cell-properties style:text-align-source="fix" style:repeat-content="false" fo:background-color="transparent" fo:border="0.06pt solid #000000" style:vertical-align="top"/>
      <style:paragraph-properties fo:text-align="start"/>
      <style:text-properties style:font-name="Calibri" fo:font-size="12pt" style:font-size-asian="12pt" style:font-size-complex="12pt"/>
    </style:style>
    <style:style style:name="ce61" style:family="table-cell" style:parent-style-name="Default" style:data-style-name="N84">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2" style:family="table-cell" style:parent-style-name="Default" style:data-style-name="N84">
      <style:table-cell-properties style:text-align-source="fix" style:repeat-content="false" fo:background-color="transparent" fo:wrap-option="wrap" fo:border="0.06pt solid #000000" style:vertical-align="top"/>
      <style:paragraph-properties fo:text-align="start"/>
      <style:text-properties style:use-window-font-color="true" style:text-outline="false" style:text-line-through-style="none" style:text-line-through-type="none" style:font-name="Calibri" fo:font-size="12pt" fo:language="en" fo:country="IN"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fo:background-color="transparent" fo:border="0.06pt solid #000000" style:vertical-align="top"/>
      <style:paragraph-properties fo:text-align="start" fo:margin-left="0cm"/>
      <style:text-properties style:font-name="Calibri" fo:font-size="12pt" style:font-size-asian="12pt" style:font-size-complex="12pt"/>
    </style:style>
    <style:style style:name="ce36" style:family="table-cell" style:parent-style-name="Default">
      <style:table-cell-properties fo:background-color="#ffff00" style:text-align-source="fix" style:repeat-content="false" fo:border="0.06pt solid #000000" style:vertical-align="middle"/>
      <style:paragraph-properties fo:text-align="center" fo:margin-left="0cm"/>
      <style:text-properties fo:color="#000000" style:font-name="Calibri" fo:font-size="12pt" fo:font-weight="bold" style:font-size-asian="12pt" style:font-weight-asian="bold" style:font-name-complex="Calibri1" style:font-size-complex="12pt" style:font-weight-complex="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font-name="Calibri" fo:font-size="12pt" style:font-size-asian="12pt" style:font-name-complex="Arial" style:font-size-complex="12pt"/>
    </style:style>
    <style:style style:name="ce66" style:family="table-cell" style:parent-style-name="Default">
      <style:table-cell-properties fo:background-color="#ffff00" style:text-align-source="fix" style:repeat-content="false" style:vertical-align="middle"/>
      <style:paragraph-properties fo:text-align="center" fo:margin-left="0cm"/>
      <style:text-properties style:font-name="Calibri" fo:font-size="12pt" style:font-size-asian="12pt" style:font-size-complex="12pt"/>
    </style:style>
    <style:style style:name="ce67" style:family="table-cell" style:parent-style-name="Default">
      <style:table-cell-properties style:vertical-align="top"/>
      <style:text-properties style:font-name="Calibri" fo:font-size="12pt" style:font-size-asian="12pt" style:font-size-complex="12pt"/>
    </style:style>
    <style:style style:name="ce68" style:family="table-cell" style:parent-style-name="Default">
      <style:table-cell-properties fo:background-color="transparent" style:vertical-align="top"/>
      <style:text-properties style:font-name="Calibri" fo:font-size="12pt" style:font-size-asian="12pt" style:font-size-complex="12pt"/>
    </style:style>
    <style:style style:name="ce69" style:family="table-cell" style:parent-style-name="Default">
      <style:table-cell-properties style:text-align-source="fix" style:repeat-content="false" style:vertical-align="top"/>
      <style:paragraph-properties fo:text-align="start" fo:margin-left="0cm"/>
      <style:text-properties style:font-name="Calibri" fo:font-size="12pt" style:font-size-asian="12pt" style:font-size-complex="12pt"/>
    </style:style>
    <style:style style:name="ce70" style:family="table-cell" style:parent-style-name="Default">
      <style:table-cell-properties style:text-align-source="fix" style:repeat-content="false" style:vertical-align="middle"/>
      <style:paragraph-properties fo:text-align="center" fo:margin-left="0cm"/>
      <style:text-properties style:font-name="Calibri" fo:font-size="12pt" style:font-size-asian="12pt" style:font-size-complex="12pt"/>
    </style:style>
    <style:style style:name="T1"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Calibri" fo:font-size="12pt" fo:font-weight="normal" style:text-underline-style="none" style:text-underline-color="font-color" style:text-line-through-type="none" fo:font-style="normal" style:text-outline="false" fo:text-shadow="none"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IN" style:language-asian="zh" style:country-asian="CN" style:language-complex="hi" style:country-complex="IN" style:font-name-asian="Microsoft YaHei" style:font-name-complex="Arial"/>
    </style:style>
    <style:style style:name="T3"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none" style:text-underline-color="font-color" style:text-line-through-type="none" fo:font-style="normal" style:text-outline="false" fo:text-shadow="none"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IN" style:language-asian="zh" style:country-asian="CN" style:language-complex="hi" style:country-complex="IN" style:font-name-asian="Microsoft YaHei" style:font-name-complex="Arial"/>
    </style:style>
    <style:style style:name="T5" style:family="text">
      <style:text-properties style:font-name="Calibri" fo:font-size="12pt" fo:font-weight="normal" style:text-underline-style="none" style:text-underline-color="font-color" style:text-line-through-type="none" fo:font-style="normal" style:text-outline="false" fo:text-shadow="none"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IN" style:language-asian="zh" style:country-asian="CN" style:language-complex="hi" style:country-complex="IN" style:font-name-asian="Microsoft YaHei" style:font-name-complex="Calibri"/>
    </style:style>
    <style:style style:name="T6"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size="12pt" style:font-size-asian="12pt" style:font-size-complex="12pt"/>
    </style:style>
    <style:style style:name="T10" style:family="text">
      <style:text-properties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style:font-size-asian="12pt" style:font-size-complex="12pt"/>
    </style:style>
    <style:style style:name="T12" style:family="text">
      <style:text-properties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style:font-name="Calibri" fo:font-size="13pt" style:font-size-asian="13pt" style:font-size-complex="13pt"/>
    </style:style>
    <style:style style:name="T15" style:family="text">
      <style:text-properties style:font-name="Calibri" fo:font-size="12pt" style:font-size-asian="12pt" style:font-size-complex="12pt"/>
    </style:style>
    <style:style style:name="T16" style:family="text">
      <style:text-properties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style:font-name="Calibri" fo:font-size="12pt" style:font-size-asian="12pt" style:font-size-complex="12pt"/>
    </style:style>
    <style:style style:name="T17" style:family="text">
      <style:text-properties fo:color="#000000" style:font-name="Calibri" fo:font-size="10.5pt"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Calibri" style:font-size-asian="10.5pt" style:font-size-complex="10.5pt" style:font-weight-asian="bold" style:font-weight-complex="bold" style:font-style-asian="normal" style:font-style-complex="normal" style:text-emphasize="none" style:font-relief="none" style:text-overline-style="none" style:text-overline-color="font-color"/>
    </style:style>
    <style:style style:name="T18" style:family="text">
      <style:text-properties fo:color="#000000" style:font-name="Calibri"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Calibri" style:font-weight-asian="bold" style:font-weight-complex="bold" style:font-style-asian="normal" style:font-style-complex="normal" style:text-emphasize="none" style:font-relief="none" style:text-overline-style="none" style:text-overline-color="font-color" fo:font-size="10pt" style:font-size-asian="10pt" style:font-size-complex="10pt"/>
    </style:style>
    <style:style style:name="T19" style:family="text">
      <style:text-properties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office:automatic-styles>
  <office:body>
    <office:spreadsheet>
      <table:calculation-settings table:automatic-find-labels="false" table:use-regular-expressions="false" table:use-wildcards="true"/>
      <table:table table:name="01-January-2025 To 22-April-2025" table:style-name="ta1">
        <office:forms form:automatic-focus="false" form:apply-design-mode="false"/>
        <table:table-column table:style-name="co1"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number-columns-repeated="2" table:default-cell-style-name="ce38"/>
        <table:table-column table:style-name="co7" table:default-cell-style-name="ce38"/>
        <table:table-column table:style-name="co8" table:default-cell-style-name="ce38"/>
        <table:table-column table:style-name="co9" table:default-cell-style-name="ce38"/>
        <table:table-column table:style-name="co10" table:default-cell-style-name="ce38"/>
        <table:table-column table:style-name="co11" table:default-cell-style-name="ce38"/>
        <table:table-column table:style-name="co12" table:default-cell-style-name="ce63"/>
        <table:table-column table:style-name="co13" table:default-cell-style-name="ce63"/>
        <table:table-column table:style-name="co14" table:default-cell-style-name="ce68"/>
        <table:table-column table:style-name="co15" table:number-columns-repeated="1005" table:default-cell-style-name="ce68"/>
        <table:table-column table:style-name="co15" table:number-columns-repeated="2" table:default-cell-style-name="ce67"/>
        <table:table-column table:style-name="co15" table:number-columns-repeated="2" table:default-cell-style-name="ce39"/>
        <table:table-row table:style-name="ro1">
          <table:table-cell table:style-name="ce2" office:value-type="string" calcext:value-type="string">
            <text:p>Test_Case Id</text:p>
          </table:table-cell>
          <table:table-cell table:style-name="ce2" office:value-type="string" calcext:value-type="string">
            <text:p>Module OR Field</text:p>
          </table:table-cell>
          <table:table-cell table:style-name="ce2" office:value-type="string" calcext:value-type="string">
            <text:p>Test Cases</text:p>
          </table:table-cell>
          <table:table-cell table:style-name="ce16" office:value-type="string" calcext:value-type="string">
            <text:p><text:s/>Test case steps Or Actions</text:p>
          </table:table-cell>
          <table:table-cell table:style-name="ce16" office:value-type="string" calcext:value-type="string">
            <text:p><text:span text:style-name="T17">Test data or</text:span><text:span text:style-name="T18"> </text:span>Input</text:p>
          </table:table-cell>
          <table:table-cell table:style-name="ce2" office:value-type="string" calcext:value-type="string">
            <text:p>Expected outcome</text:p>
          </table:table-cell>
          <table:table-cell table:style-name="ce26" office:value-type="string" calcext:value-type="string">
            <text:p>QA Remarks or Actual output</text:p>
          </table:table-cell>
          <table:table-cell table:style-name="ce26" office:value-type="string" calcext:value-type="string">
            <text:p>Bug # No</text:p>
          </table:table-cell>
          <table:table-cell table:style-name="ce26" office:value-type="string" calcext:value-type="string">
            <text:p>Priority</text:p>
          </table:table-cell>
          <table:table-cell table:style-name="ce26" office:value-type="string" calcext:value-type="string">
            <text:p>Status</text:p>
          </table:table-cell>
          <table:table-cell table:style-name="ce31" office:value-type="string" calcext:value-type="string">
            <text:p>Performed By</text:p>
          </table:table-cell>
          <table:table-cell table:style-name="ce31" office:value-type="string" calcext:value-type="string">
            <text:p>Submitted Date</text:p>
          </table:table-cell>
          <table:table-cell table:style-name="ce31" office:value-type="string" calcext:value-type="string">
            <text:p>Assigned</text:p>
          </table:table-cell>
          <table:table-cell table:style-name="ce36" office:value-type="string" calcext:value-type="string">
            <text:p>Comments</text:p>
          </table:table-cell>
          <table:table-cell table:style-name="ce66" table:number-columns-repeated="1006"/>
          <table:table-cell table:style-name="ce70" table:number-columns-repeated="2"/>
          <table:table-cell table:number-columns-repeated="2"/>
        </table:table-row>
        <table:table-row table:style-name="ro2">
          <table:table-cell table:style-name="ce37" office:value-type="string" calcext:value-type="string">
            <text:p>TC_01</text:p>
          </table:table-cell>
          <table:table-cell table:style-name="ce40" office:value-type="string" calcext:value-type="string">
            <text:p>Collection : Filters Fields </text:p>
          </table:table-cell>
          <table:table-cell table:style-name="ce45" office:value-type="string" calcext:value-type="string">
            <text:p>SQLGrammarException Thrown in Console When Searching Bills with All Filters.</text:p>
          </table:table-cell>
          <table:table-cell table:style-name="ce46" office:value-type="string" calcext:value-type="string">
            <text:p>Step 1 : Navigate to A/R click on Collections</text:p>
            <text:p>Step 2 : On the Search Bills screen, select filters such as Pharmacy, Protocol, and Payer in the </text:p>
            <text:p>             All Filters section.</text:p>
            <text:p>Step 3 : Click on the Search button </text:p>
            <text:p>Step 4 : Observe the console output in Eclipse during the search operation.</text:p>
          </table:table-cell>
          <table:table-cell table:style-name="ce46" office:value-type="string" calcext:value-type="string">
            <text:p>NA</text:p>
          </table:table-cell>
          <table:table-cell table:style-name="ce46" office:value-type="string" calcext:value-type="string">
            <text:p>1. The search operation should execute successfully and display results based on </text:p>
            <text:p>    The selected filters.</text:p>
            <text:p>2. No errors should be logged in the console.</text:p>
          </table:table-cell>
          <table:table-cell table:style-name="ce46" office:value-type="string" calcext:value-type="string">
            <text:p>1. The search operation triggers an exception in the console:</text:p>
            <text:p>org.hibernate.exception.SQLGrammarException.</text:p>
            <text:p/>
            <text:p>2. Results are not displayed as expected due to the exception.</text:p>
          </table:table-cell>
          <table:table-cell table:style-name="ce44" office:value-type="string" calcext:value-type="string">
            <text:p><text:a xlink:href="https://projects.aithent.com/plugins/tracker/?aid=185453" xlink:type="simple">#185453</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02" calcext:value-type="date">
            <text:p>2025-01-02</text:p>
          </table:table-cell>
          <table:table-cell office:value-type="string" calcext:value-type="string">
            <text:p>Yash</text:p>
          </table:table-cell>
          <table:table-cell office:value-type="string" calcext:value-type="string">
            <text:p>Fixed On Both Side.</text:p>
          </table:table-cell>
          <table:table-cell table:style-name="ce67" table:number-columns-repeated="1006"/>
          <table:table-cell table:number-columns-repeated="4"/>
        </table:table-row>
        <table:table-row table:style-name="ro3">
          <table:table-cell table:style-name="ce37" office:value-type="string" calcext:value-type="string">
            <text:p>TC_02</text:p>
          </table:table-cell>
          <table:table-cell table:style-name="ce40" office:value-type="string" calcext:value-type="string">
            <text:p>HL7 Mode Review Charges  : PDF Report</text:p>
            <text:p/>
          </table:table-cell>
          <table:table-cell table:style-name="ce45" office:value-type="string" calcext:value-type="string">
            <text:p>Missing Updated Records in Exported PDF Reports After Status Update from Pending to Billable in HL7 Mode.</text:p>
          </table:table-cell>
          <table:table-cell table:style-name="ce46" office:value-type="string" calcext:value-type="string">
            <text:p>Step 1 : Set the UBAR on HL7 Mode  </text:p>
            <text:p>Step 2 : Navigate to the Billing click on Review Charges </text:p>
            <text:p>Step 3 : Search for charges created in HL7 Mode.</text:p>
            <text:p>Step 4 : Change the status from Pending Review to Billable using check box</text:p>
            <text:p>Step 5 : A pop-up page will appear listing the services selected for the status change.</text:p>
            <text:p>Step 6 : Confirm the status change. The status of the services will be updated successfully,</text:p>
            <text:p>             And the updated records will now display in the list.</text:p>
            <text:p><text:span text:style-name="T6">Step 7 : Export the records to PDF .</text:span></text:p>
            <text:p><text:span text:style-name="T6">Step 8 : Observe the exported files for the updated records.</text:span></text:p>
          </table:table-cell>
          <table:table-cell table:style-name="ce44" office:value-type="string" calcext:value-type="string">
            <text:p>Plan Name <text:s text:c="44"/>: hl7 plan 52</text:p>
          </table:table-cell>
          <table:table-cell table:style-name="ce46" office:value-type="string" calcext:value-type="string">
            <text:p>The exported PDF file should contain all records, including both successfully </text:p>
            <text:p>Updated and unsuccessfully updated records, from Pending Review to Billable.</text:p>
          </table:table-cell>
          <table:table-cell table:style-name="ce46" office:value-type="string" calcext:value-type="string">
            <text:p>The PDF export file is missing records that were successfully updated. Only the records that were not updated successfully appear in the export.</text:p>
          </table:table-cell>
          <table:table-cell table:style-name="ce44" office:value-type="string" calcext:value-type="string">
            <text:p><text:a xlink:href="https://projects.aithent.com/plugins/tracker/?aid=185629" xlink:type="simple">#185629</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03" calcext:value-type="date">
            <text:p>2025-01-03</text:p>
          </table:table-cell>
          <table:table-cell office:value-type="string" calcext:value-type="string">
            <text:p>Yash</text:p>
          </table:table-cell>
          <table:table-cell office:value-type="string" calcext:value-type="string">
            <text:p>Retesting Pending</text:p>
          </table:table-cell>
          <table:table-cell table:number-columns-repeated="1010"/>
        </table:table-row>
        <table:table-row table:style-name="ro4">
          <table:table-cell table:style-name="ce37" office:value-type="string" calcext:value-type="string">
            <text:p>TC_03</text:p>
          </table:table-cell>
          <table:table-cell table:style-name="ce40" office:value-type="string" calcext:value-type="string">
            <text:p>Search Bill : Trn Date Column</text:p>
          </table:table-cell>
          <table:table-cell table:style-name="ce45" office:value-type="string" calcext:value-type="string">
            <text:p>Incorrect Column Display : Trn Date column shown instead of charge date based on back-end validation.</text:p>
          </table:table-cell>
          <table:table-cell table:style-name="ce46" office:value-type="string" calcext:value-type="string">
            <text:p>Step 1 : Navigate to the Billing Click on Search Bill. </text:p>
            <text:p><text:span text:style-name="T6">Step 2 : Click on Search Button and Search for bills using the search field</text:span></text:p>
            <text:p>Step 3 : From the Bill No Column, click on the link to edit the bill.</text:p>
            <text:p>Step 4 : Click on the Add more services button.</text:p>
            <text:p>Step 5 : Observe the Billable Services pop-up displayed. </text:p>
            <text:p>Step 6 : Verify the Trn Date column in the pop-up.</text:p>
          </table:table-cell>
          <table:table-cell table:style-name="ce44" office:value-type="string" calcext:value-type="string">
            <text:p>Plan Name <text:s text:c="44"/>: <text:s/>51 plan</text:p>
          </table:table-cell>
          <table:table-cell table:style-name="ce46" office:value-type="string" calcext:value-type="string">
            <text:p>1. If the back-end validation is set to D, the system should display a Charge Date column in the Billable Services pop-up.</text:p>
            <text:p/>
            <text:p>2. If the back-end validation is set to T, the system should display a Trn Date column in the Billable Services pop-up.</text:p>
          </table:table-cell>
          <table:table-cell table:style-name="ce46" office:value-type="string" calcext:value-type="string">
            <text:p>The system is working based on the D Validation ( Charge Date ), but </text:p>
            <text:p>The Trn Date Column in the Billable Services pop-up.</text:p>
          </table:table-cell>
          <table:table-cell table:style-name="ce44" office:value-type="string" calcext:value-type="string">
            <text:p><text:a xlink:href="https://projects.aithent.com/plugins/tracker/?aid=185958" xlink:type="simple">#185958</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07" calcext:value-type="date">
            <text:p>2025-01-07</text:p>
          </table:table-cell>
          <table:table-cell office:value-type="string" calcext:value-type="string">
            <text:p>Sandeep</text:p>
          </table:table-cell>
          <table:table-cell table:style-name="ce38" office:value-type="string" calcext:value-type="string">
            <text:p>Fixed On Both Side.</text:p>
          </table:table-cell>
          <table:table-cell table:number-columns-repeated="1010"/>
        </table:table-row>
        <table:table-row table:style-name="ro5">
          <table:table-cell table:style-name="ce37" office:value-type="string" calcext:value-type="string">
            <text:p>TC_04</text:p>
          </table:table-cell>
          <table:table-cell table:style-name="ce40" office:value-type="string" calcext:value-type="string">
            <text:p><text:span text:style-name="T1">Bill Service Report : </text:span><text:span text:style-name="T2">Edit Bill Screen</text:span></text:p>
          </table:table-cell>
          <table:table-cell table:style-name="ce45" office:value-type="string" calcext:value-type="string">
            <text:p>Edit Bill Screen Fails to Open from Bill Service Report.</text:p>
          </table:table-cell>
          <table:table-cell table:style-name="ce46" office:value-type="string" calcext:value-type="string">
            <text:p><text:span text:style-name="T6">Step 1 : Navigate to the Reports Click on Search Bills</text:span></text:p>
            <text:p><text:span text:style-name="T6">Step 2 : Click on Search Button and Search for bills using the search field</text:span></text:p>
            <text:p><text:span text:style-name="T6">Step 3 : From the Bill No Column, click on the link to edit the bill.</text:span></text:p>
            <text:p/>
          </table:table-cell>
          <table:table-cell table:style-name="ce44" office:value-type="string" calcext:value-type="string">
            <text:p>Plan Name <text:s text:c="44"/>: <text:s/>WORKLIST_PLAN_TEST </text:p>
          </table:table-cell>
          <table:table-cell table:style-name="ce46" office:value-type="string" calcext:value-type="string">
            <text:p>Clicking the link in the Bill No column should open the Edit Bill screen, allowing the user to make necessary changes to the bill details</text:p>
          </table:table-cell>
          <table:table-cell table:style-name="ce46" office:value-type="string" calcext:value-type="string">
            <text:p>Clicking the link in the Bill No column fails to open the Edit Bill screen.</text:p>
            <text:p>The user is unable to proceed with bill editing operations.</text:p>
          </table:table-cell>
          <table:table-cell table:style-name="ce44" office:value-type="string" calcext:value-type="string">
            <text:p><text:a xlink:href="https://projects.aithent.com/plugins/tracker/?aid=185975" xlink:type="simple">#185975</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07" calcext:value-type="date">
            <text:p>2025-01-07</text:p>
          </table:table-cell>
          <table:table-cell office:value-type="string" calcext:value-type="string">
            <text:p>Sandeep</text:p>
          </table:table-cell>
          <table:table-cell table:style-name="ce38" office:value-type="string" calcext:value-type="string">
            <text:p>Fixed On Both Side.</text:p>
          </table:table-cell>
          <table:table-cell table:number-columns-repeated="1010"/>
        </table:table-row>
        <table:table-row table:style-name="ro4">
          <table:table-cell table:style-name="ce37" office:value-type="string" calcext:value-type="string">
            <text:p>TC_05</text:p>
          </table:table-cell>
          <table:table-cell table:style-name="ce40" office:value-type="string" calcext:value-type="string">
            <text:p>Hl7 mode Review Charges : Change Status</text:p>
          </table:table-cell>
          <table:table-cell table:style-name="ce46" office:value-type="string" calcext:value-type="string">
            <text:p>Pop-up for Confirming Status Change from Pending Review to Billable Fails to Display in View/Edit Column</text:p>
          </table:table-cell>
          <table:table-cell table:style-name="ce46" office:value-type="string" calcext:value-type="string">
            <text:p><text:span text:style-name="T6">Step 1 : Set the UBAR on HL7 Mode  </text:span></text:p>
            <text:p><text:span text:style-name="T6">Step 2 : Navigate to the Billing click on Review Charges </text:span></text:p>
            <text:p><text:span text:style-name="T6">Step 3 : Click the Search button and search for charges created in HL7 Mode.</text:span></text:p>
            <text:p><text:span text:style-name="T6">Step 4 : Move on View/Edit column for a charge and click on view more details.</text:span></text:p>
            <text:p><text:span text:style-name="T6">Step 5 : On the View/Edit Services page, change the Billing Status drop down (e.g., from </text:span></text:p>
            <text:p><text:span text:style-name="T6">              Pending Review to Billable).</text:span></text:p>
          </table:table-cell>
          <table:table-cell table:style-name="ce44" office:value-type="string" calcext:value-type="string">
            <text:p>Plan Name <text:s text:c="44"/>: HL7 Plan</text:p>
          </table:table-cell>
          <table:table-cell table:style-name="ce46" office:value-type="string" calcext:value-type="string">
            <text:p>A pop-up displaying the list of services selected for changing the status from Pending Review to Billable should be displayed.</text:p>
          </table:table-cell>
          <table:table-cell table:style-name="ce46" office:value-type="string" calcext:value-type="string">
            <text:p>The pop-up for confirming the status change from Pending Review to Billable fails to display when using the View/Edit column.</text:p>
          </table:table-cell>
          <table:table-cell table:style-name="ce44" office:value-type="string" calcext:value-type="string">
            <text:p><text:a xlink:href="https://projects.aithent.com/plugins/tracker/?aid=185982" xlink:type="simple">#185982</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07" calcext:value-type="date">
            <text:p>2025-01-07</text:p>
          </table:table-cell>
          <table:table-cell office:value-type="string" calcext:value-type="string">
            <text:p>Yash</text:p>
          </table:table-cell>
          <table:table-cell table:style-name="ce42" office:value-type="string" calcext:value-type="string">
            <text:p>Retesting Pending</text:p>
          </table:table-cell>
          <table:table-cell table:number-columns-repeated="1010"/>
        </table:table-row>
        <table:table-row table:style-name="ro6">
          <table:table-cell table:style-name="ce37" office:value-type="string" calcext:value-type="string">
            <text:p>TC_06</text:p>
          </table:table-cell>
          <table:table-cell table:style-name="ce40" office:value-type="string" calcext:value-type="string">
            <text:p><text:span text:style-name="T1">HL7 Mode Review Charges  : Excel Report</text:span></text:p>
            <text:p/>
          </table:table-cell>
          <table:table-cell table:style-name="ce45" office:value-type="string" calcext:value-type="string">
            <text:p>Missing Updated Records in Exported Excel File After Status Change from Pending Review to Billable</text:p>
          </table:table-cell>
          <table:table-cell table:style-name="ce50" office:value-type="string" calcext:value-type="string">
            <text:p><text:span text:style-name="T6">Step 1 : Set the UBAR on HL7 Mode  </text:span></text:p>
            <text:p><text:span text:style-name="T6">Step 2 : Navigate to the Billing click on Review Charges </text:span></text:p>
            <text:p><text:span text:style-name="T6">Step 3 : Search for charges created in HL7 Mode.</text:span></text:p>
            <text:p><text:span text:style-name="T6">Step 4 : Change the status from Pending Review to Billable using check box</text:span></text:p>
            <text:p><text:span text:style-name="T6">Step 5 : A pop-up page will appear listing the services selected for the status change.</text:span></text:p>
            <text:p><text:span text:style-name="T6">Step 6 : Confirm the status change. The status of the services will be updated successfully,  </text:span></text:p>
            <text:p><text:span text:style-name="T6">              And the updated records will now display in the list.</text:span></text:p>
            <text:p><text:span text:style-name="T6">Step 7 : Export the updated records to Excel formats.</text:span></text:p>
            <text:p><text:span text:style-name="T6">Step 8 : Open the exported Excel file and observe that the services marked as "updated </text:span></text:p>
            <text:p><text:span text:style-name="T6">              Successfully" are missing from the export.</text:span></text:p>
          </table:table-cell>
          <table:table-cell table:style-name="ce44" office:value-type="string" calcext:value-type="string">
            <text:p>Plan Name <text:s text:c="44"/>: hl7 plan 52</text:p>
          </table:table-cell>
          <table:table-cell table:style-name="ce46" office:value-type="string" calcext:value-type="string">
            <text:p>The exported Excel file should contain all records, including both successfully updated and unsuccessfully updated records, from Pending Review to Billable.</text:p>
          </table:table-cell>
          <table:table-cell table:style-name="ce46" office:value-type="string" calcext:value-type="string">
            <text:p>The Excel export file is missing records that were successfully updated. Only the records that were not updated successfully appear in the export.</text:p>
          </table:table-cell>
          <table:table-cell table:style-name="ce44" office:value-type="string" calcext:value-type="string">
            <text:p><text:a xlink:href="https://projects.aithent.com/plugins/tracker/?aid=186051" xlink:type="simple">#186051</text:a> </text:p>
          </table:table-cell>
          <table:table-cell table:style-name="ce44" office:value-type="string" calcext:value-type="string">
            <text:p>P-1 High</text:p>
          </table:table-cell>
          <table:table-cell table:style-name="ce44" office:value-type="string" calcext:value-type="string">
            <text:p>New</text:p>
          </table:table-cell>
          <table:table-cell table:style-name="ce44" office:value-type="string" calcext:value-type="string">
            <text:p>Prakash Sheri</text:p>
          </table:table-cell>
          <table:table-cell table:style-name="ce60" office:value-type="date" office:date-value="2025-01-08" calcext:value-type="date">
            <text:p>2025-01-08</text:p>
          </table:table-cell>
          <table:table-cell office:value-type="string" calcext:value-type="string">
            <text:p>Yash</text:p>
          </table:table-cell>
          <table:table-cell table:style-name="ce42" office:value-type="string" calcext:value-type="string">
            <text:p>Pending On Both Side.</text:p>
          </table:table-cell>
          <table:table-cell table:style-name="ce67" table:number-columns-repeated="1006"/>
          <table:table-cell table:number-columns-repeated="4"/>
        </table:table-row>
        <table:table-row table:style-name="ro5">
          <table:table-cell table:style-name="ce37" office:value-type="string" calcext:value-type="string">
            <text:p>TC_07</text:p>
          </table:table-cell>
          <table:table-cell table:style-name="ce40" office:value-type="string" calcext:value-type="string">
            <text:p><text:span text:style-name="T3">Bill Service Report : </text:span><text:span text:style-name="T4">Quantity Column </text:span></text:p>
          </table:table-cell>
          <table:table-cell table:style-name="ce45" office:value-type="string" calcext:value-type="string">
            <text:p>Quantity Column Displays "$" Symbol in Exported Bill Service Report.</text:p>
          </table:table-cell>
          <table:table-cell table:style-name="ce50" office:value-type="string" calcext:value-type="string">
            <text:p>Step 1 : Navigate to the Reports Click on Bill Service Report.</text:p>
            <text:p>Step 2 : Export the report to Excel.</text:p>
            <text:p>Step 3 : Open the exported Excel report..</text:p>
            <text:p><text:span text:style-name="T10">Step 4 : </text:span><text:span text:style-name="T11">Observe the Quantity column data.</text:span></text:p>
          </table:table-cell>
          <table:table-cell table:style-name="ce44" office:value-type="string" calcext:value-type="string">
            <text:p>Plan Name <text:s text:c="35"/>: 51 Plan Tesing UBAR 13-01-2025</text:p>
          </table:table-cell>
          <table:table-cell table:style-name="ce46" office:value-type="string" calcext:value-type="string">
            <text:p>The Quantity column in the exported Excel report should display numeric values without any currency symbol.</text:p>
          </table:table-cell>
          <table:table-cell table:style-name="ce46" office:value-type="string" calcext:value-type="string">
            <text:p>The Quantity column in the exported Excel report incorrectly displays a "$" symbol alongside the numeric data.</text:p>
          </table:table-cell>
          <table:table-cell table:style-name="ce44" office:value-type="string" calcext:value-type="string">
            <text:p><text:a xlink:href="https://projects.aithent.com/plugins/tracker/?aid=186635" xlink:type="simple">#186635</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16" calcext:value-type="date">
            <text:p>2025-01-16</text:p>
          </table:table-cell>
          <table:table-cell office:value-type="string" calcext:value-type="string">
            <text:p>Yash</text:p>
          </table:table-cell>
          <table:table-cell office:value-type="string" calcext:value-type="string">
            <text:p>Fixed On Both Side.</text:p>
          </table:table-cell>
          <table:table-cell table:number-columns-repeated="1006"/>
          <table:table-cell table:style-name="ce68" table:number-columns-repeated="2"/>
          <table:table-cell table:number-columns-repeated="2"/>
        </table:table-row>
        <table:table-row table:style-name="ro7">
          <table:table-cell table:style-name="ce37" office:value-type="string" calcext:value-type="string">
            <text:p>TC_08</text:p>
          </table:table-cell>
          <table:table-cell table:style-name="ce40" office:value-type="string" calcext:value-type="string">
            <text:p>Bill Service Report : Show Entries</text:p>
          </table:table-cell>
          <table:table-cell table:style-name="ce45" office:value-type="string" calcext:value-type="string">
            <text:p>Missing "Show Entries" Drop-down in Search Results of Bill Service Report.</text:p>
          </table:table-cell>
          <table:table-cell table:style-name="ce50" office:value-type="string" calcext:value-type="string">
            <text:p>Step 1 : Navigate to the Report Click on Bill Service Report </text:p>
            <text:p>Step 2 : Click on Search Button </text:p>
            <text:p>Step 3 : Observe the search results screen.</text:p>
          </table:table-cell>
          <table:table-cell table:style-name="ce44" office:value-type="string" calcext:value-type="string">
            <text:p>NA</text:p>
          </table:table-cell>
          <table:table-cell table:style-name="ce46" office:value-type="string" calcext:value-type="string">
            <text:p>The search result screen should display the "Show Entries" drop-down to allow users to adjust the number of entries displayed per page.</text:p>
          </table:table-cell>
          <table:table-cell table:style-name="ce46" office:value-type="string" calcext:value-type="string">
            <text:p>The "Show Entries" drop-down is missing from the search result screen, limiting the user's ability to control the display of entries.</text:p>
          </table:table-cell>
          <table:table-cell table:style-name="ce44" office:value-type="string" calcext:value-type="string">
            <text:p><text:a xlink:href="https://projects.aithent.com/goto?key=stdbugs&amp;val=186919&amp;group_id=181" xlink:type="simple">#186919</text:a></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21" calcext:value-type="date">
            <text:p>2025-01-21</text:p>
          </table:table-cell>
          <table:table-cell office:value-type="string" calcext:value-type="string">
            <text:p>Yash</text:p>
          </table:table-cell>
          <table:table-cell office:value-type="string" calcext:value-type="string">
            <text:p>Fixed On Both Side.</text:p>
          </table:table-cell>
          <table:table-cell table:style-name="ce67" table:number-columns-repeated="1006"/>
          <table:table-cell table:number-columns-repeated="4"/>
        </table:table-row>
        <table:table-row table:style-name="ro7">
          <table:table-cell table:style-name="ce37" office:value-type="string" calcext:value-type="string">
            <text:p>TC_09</text:p>
          </table:table-cell>
          <table:table-cell table:style-name="ce40" office:value-type="string" calcext:value-type="string">
            <text:p>Aging Report : Excel </text:p>
          </table:table-cell>
          <table:table-cell table:style-name="ce45" office:value-type="string" calcext:value-type="string">
            <text:p>Incomplete Horizontal Lines at the End of Exported Aging Report Excel</text:p>
          </table:table-cell>
          <table:table-cell table:style-name="ce46" office:value-type="string" calcext:value-type="string">
            <text:p>Step 1 : Navigate to the Reports Click on the Aging Report</text:p>
            <text:p>Step 2 : Select any checkbox and export the report to Excel.</text:p>
            <text:p>Step 3 : Open the exported Excel file and observe the last row of the report.</text:p>
          </table:table-cell>
          <table:table-cell table:style-name="ce44" office:value-type="string" calcext:value-type="string">
            <text:p>NA</text:p>
          </table:table-cell>
          <table:table-cell table:style-name="ce46" office:value-type="string" calcext:value-type="string">
            <text:p>The last row of the report should have complete horizontal lines (upper and lower) in black, extending fully across the row to ensure consistent and clean formatting.</text:p>
          </table:table-cell>
          <table:table-cell table:style-name="ce46" office:value-type="string" calcext:value-type="string">
            <text:p>The last row of the report has incomplete horizontal lines (upper and lower), which do not extend fully across the row, disrupting the visual format. </text:p>
          </table:table-cell>
          <table:table-cell table:style-name="ce44" office:value-type="string" calcext:value-type="string">
            <text:p><text:a xlink:href="https://projects.aithent.com/plugins/tracker/?aid=187084" xlink:type="simple">#187084</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23" calcext:value-type="date">
            <text:p>2025-01-23</text:p>
          </table:table-cell>
          <table:table-cell office:value-type="string" calcext:value-type="string">
            <text:p>Yash</text:p>
          </table:table-cell>
          <table:table-cell office:value-type="string" calcext:value-type="string">
            <text:p>Fixed On Both Side.</text:p>
          </table:table-cell>
          <table:table-cell table:style-name="ce67" table:number-columns-repeated="1006"/>
          <table:table-cell table:number-columns-repeated="4"/>
        </table:table-row>
        <table:table-row table:style-name="ro7">
          <table:table-cell table:style-name="ce37" office:value-type="string" calcext:value-type="string">
            <text:p>TC_10</text:p>
          </table:table-cell>
          <table:table-cell table:style-name="ce40" office:value-type="string" calcext:value-type="string">
            <text:p>Search Plan : Protocol Type</text:p>
          </table:table-cell>
          <table:table-cell table:style-name="ce45" office:value-type="string" calcext:value-type="string">
            <text:p>Protocol Type" Field Retained When Billing Plan Status is Changed in Search Plan.</text:p>
          </table:table-cell>
          <table:table-cell table:style-name="ce46" office:value-type="string" calcext:value-type="string">
            <text:p>Step 1 : Navigate to maintenance click on plan</text:p>
            <text:p>Step 2 : On Search Plan Selected All filters </text:p>
            <text:p>Step 3 : Change the Billing Plan Status to a different status.</text:p>
          </table:table-cell>
          <table:table-cell table:style-name="ce44" office:value-type="string" calcext:value-type="string">
            <text:p>NA</text:p>
          </table:table-cell>
          <table:table-cell table:style-name="ce46" office:value-type="string" calcext:value-type="string">
            <text:p>Changing the Billing Plan Status should reset all fields, including the Protocol Type, to their default state or empty values.</text:p>
          </table:table-cell>
          <table:table-cell table:style-name="ce46" office:value-type="string" calcext:value-type="string">
            <text:p>The "Protocol Type" field is not reset and remains selected, while other filters are cleared.</text:p>
          </table:table-cell>
          <table:table-cell table:style-name="ce44" office:value-type="string" calcext:value-type="string">
            <text:p><text:a xlink:href="https://projects.aithent.com/plugins/tracker/?aid=187147" xlink:type="simple">#187147</text:a> </text:p>
          </table:table-cell>
          <table:table-cell table:style-name="ce44" office:value-type="string" calcext:value-type="string">
            <text:p>P3-Low </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24" calcext:value-type="date">
            <text:p>2025-01-24</text:p>
          </table:table-cell>
          <table:table-cell office:value-type="string" calcext:value-type="string">
            <text:p>Jitender</text:p>
          </table:table-cell>
          <table:table-cell office:value-type="string" calcext:value-type="string">
            <text:p>Fixed On Both Side.</text:p>
          </table:table-cell>
          <table:table-cell table:style-name="ce67" table:number-columns-repeated="1006"/>
          <table:table-cell table:number-columns-repeated="4"/>
        </table:table-row>
        <table:table-row table:style-name="ro5">
          <table:table-cell table:style-name="ce37" office:value-type="string" calcext:value-type="string">
            <text:p>TC_11</text:p>
          </table:table-cell>
          <table:table-cell table:style-name="ce40" office:value-type="string" calcext:value-type="string">
            <text:p>Search Received Payments : Payer Text Field </text:p>
          </table:table-cell>
          <table:table-cell table:style-name="ce45" office:value-type="string" calcext:value-type="string">
            <text:p>Payer <text:s/>filed loses selected filter after clicking View/Edit in A/R Received Payment.</text:p>
          </table:table-cell>
          <table:table-cell table:style-name="ce46" office:value-type="string" calcext:value-type="string">
            <text:p>Step 1 : Navigate to the A/R Click on Received Payment .</text:p>
            <text:p>Step 2 : Fill or enter all filters Click on search Button</text:p>
            <text:p>Step 3 : In the Action Column drop-down, click on the View/Edit button</text:p>
            <text:p>Step 4 : Observe the behavior of the selected filters.</text:p>
          </table:table-cell>
          <table:table-cell table:style-name="ce44" office:value-type="string" calcext:value-type="string">
            <text:p>Payer <text:s text:c="32"/>: Plan 27-02-2025</text:p>
          </table:table-cell>
          <table:table-cell table:style-name="ce46" office:value-type="string" calcext:value-type="string">
            <text:p>All selected filters, including the Payer text field, should retain their values after clicking the View/Edit button.</text:p>
          </table:table-cell>
          <table:table-cell table:style-name="ce46" office:value-type="string" calcext:value-type="string">
            <text:p>All selected filters are retained, but the Payer text field loses its selected value.</text:p>
          </table:table-cell>
          <table:table-cell table:style-name="ce44" office:value-type="string" calcext:value-type="string">
            <text:p><text:a xlink:href="https://projects.aithent.com/goto?key=stdbugs&amp;val=187341&amp;group_id=181" xlink:type="simple">#187341</text:a></text:p>
          </table:table-cell>
          <table:table-cell table:style-name="ce44" office:value-type="string" calcext:value-type="string">
            <text:p>P2-Medium</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27" calcext:value-type="date">
            <text:p>2025-01-27</text:p>
          </table:table-cell>
          <table:table-cell office:value-type="string" calcext:value-type="string">
            <text:p>Sandeep</text:p>
          </table:table-cell>
          <table:table-cell office:value-type="string" calcext:value-type="string">
            <text:p>Pending On Both Side.</text:p>
          </table:table-cell>
          <table:table-cell table:style-name="ce67" table:number-columns-repeated="1006"/>
          <table:table-cell table:number-columns-repeated="4"/>
        </table:table-row>
        <table:table-row table:style-name="ro2">
          <table:table-cell table:style-name="ce37" office:value-type="string" calcext:value-type="string">
            <text:p>TC_12</text:p>
          </table:table-cell>
          <table:table-cell table:style-name="ce40" office:value-type="string" calcext:value-type="string">
            <text:p>Receive Payment : Search Result- Received Payments</text:p>
          </table:table-cell>
          <table:table-cell table:style-name="ce45" office:value-type="string" calcext:value-type="string">
            <text:p>Search Result - Received Payments" Header Row Displays on Disabled Add New Received Payment Page.</text:p>
          </table:table-cell>
          <table:table-cell table:style-name="ce46" office:value-type="string" calcext:value-type="string">
            <text:p><text:span text:style-name="T12">Step 1 : Navigate to the A/R Click on Received Payment .</text:span></text:p>
            <text:p><text:span text:style-name="T12">Step 2 : Click on Add New Received Payments Button</text:span></text:p>
            <text:p><text:span text:style-name="T12">Step 3 : Click on Cancel Button,</text:span></text:p>
            <text:p><text:span text:style-name="T12">Step 4 : Observe the behavior of the Add New Receive Payment page.</text:span></text:p>
          </table:table-cell>
          <table:table-cell table:style-name="ce44" office:value-type="string" calcext:value-type="string">
            <text:p>NA</text:p>
          </table:table-cell>
          <table:table-cell table:style-name="ce46" office:value-type="string" calcext:value-type="string">
            <text:p>After clicking the Cancel button, the Add New Receive Payment page should close, and the user should be redirected to the main page or search results without any visual inconsistencies.</text:p>
          </table:table-cell>
          <table:table-cell table:style-name="ce46" office:value-type="string" calcext:value-type="string">
            <text:p>After clicking the Cancel button, the Add New Receive Payment page becomes disabled, but the Search Result - Received Payments header row is still displayed, causing a visual inconsistency.</text:p>
          </table:table-cell>
          <table:table-cell table:style-name="ce44" office:value-type="string" calcext:value-type="string">
            <text:p><text:a xlink:href="https://projects.aithent.com/goto?key=stdbugs&amp;val=187348&amp;group_id=181" xlink:type="simple">#187348</text:a></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1-27" calcext:value-type="date">
            <text:p>2025-01-27</text:p>
          </table:table-cell>
          <table:table-cell office:value-type="string" calcext:value-type="string">
            <text:p>Yash</text:p>
          </table:table-cell>
          <table:table-cell table:style-name="ce65" office:value-type="string" calcext:value-type="string">
            <text:p>52 Fixed But Open 51</text:p>
          </table:table-cell>
          <table:table-cell table:style-name="ce67" table:number-columns-repeated="1006"/>
          <table:table-cell table:number-columns-repeated="4"/>
        </table:table-row>
        <table:table-row table:style-name="ro2">
          <table:table-cell table:style-name="ce37" office:value-type="string" calcext:value-type="string">
            <text:p>TC_13</text:p>
          </table:table-cell>
          <table:table-cell table:style-name="ce40" office:value-type="string" calcext:value-type="string">
            <text:p>Payer <text:s text:c="5"/>: Place Holder Email</text:p>
          </table:table-cell>
          <table:table-cell table:style-name="ce45" office:value-type="string" calcext:value-type="string">
            <text:p>Missing Placeholder Text in Email Field.</text:p>
          </table:table-cell>
          <table:table-cell table:style-name="ce46" office:value-type="string" calcext:value-type="string">
            <text:p>Step 1 : Navigate to "Maintenance" and click on "Payer."</text:p>
            <text:p>Step 2 : Click on the "Search" button and search for a Payer.</text:p>
            <text:p><text:span text:style-name="T13">Step 3 : </text:span>In the Payer details screen, remove any existing email data or ensure the email field </text:p>
            <text:p>             Is Empty.</text:p>
            <text:p><text:span text:style-name="T13">Step 4 : </text:span>Observe the behavior of the email field.</text:p>
          </table:table-cell>
          <table:table-cell table:style-name="ce44" office:value-type="string" calcext:value-type="string">
            <text:p>Payer Name <text:s text:c="32"/>: 03-02-2025 Payer</text:p>
          </table:table-cell>
          <table:table-cell table:style-name="ce46" office:value-type="string" calcext:value-type="string">
            <text:p>The placeholder text "Enter email(s), Separated by commas" should be visible in the email field when it is either empty or after data is removed.</text:p>
          </table:table-cell>
          <table:table-cell table:style-name="ce46" office:value-type="string" calcext:value-type="string">
            <text:p>The placeholder text is missing, leaving the email field blank without instructions.</text:p>
          </table:table-cell>
          <table:table-cell table:style-name="ce44" office:value-type="string" calcext:value-type="string">
            <text:p><text:a xlink:href="https://projects.aithent.com/goto?key=stdbugs&amp;val=187838&amp;group_id=181" xlink:type="simple">#187838</text:a></text:p>
          </table:table-cell>
          <table:table-cell table:style-name="ce44" office:value-type="string" calcext:value-type="string">
            <text:p>P2-Medium </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03" calcext:value-type="date">
            <text:p>2025-02-03</text:p>
          </table:table-cell>
          <table:table-cell office:value-type="string" calcext:value-type="string">
            <text:p>Jitender</text:p>
          </table:table-cell>
          <table:table-cell table:style-name="ce65" office:value-type="string" calcext:value-type="string">
            <text:p>Pending On Both Side.</text:p>
          </table:table-cell>
          <table:table-cell table:style-name="ce67" table:number-columns-repeated="1006"/>
          <table:table-cell table:number-columns-repeated="4"/>
        </table:table-row>
        <table:table-row table:style-name="ro4">
          <table:table-cell table:style-name="ce37" office:value-type="string" calcext:value-type="string">
            <text:p>TC_14</text:p>
          </table:table-cell>
          <table:table-cell table:style-name="ce40" office:value-type="string" calcext:value-type="string">
            <text:p>Plan <text:s text:c="7"/>: Add New Payer Screen</text:p>
          </table:table-cell>
          <table:table-cell table:style-name="ce45" office:value-type="string" calcext:value-type="string">
            <text:p>Missing Placeholder Text in Email Field on add new payer page.</text:p>
          </table:table-cell>
          <table:table-cell table:style-name="ce46" office:value-type="string" calcext:value-type="string">
            <text:p>Step 1 : Navigate to "Maintenance" and click on "Plan."</text:p>
            <text:p>Step 2 : Click on the "Search" button and search for a Plan Name.</text:p>
            <text:p>Step 3 : From Action Column Click on Payer Button</text:p>
            <text:p>Step 4 : From Attach New Payer Text Field Click on Advance Search</text:p>
            <text:p>Step 5 : Click on Add New payer Button.</text:p>
            <text:p><text:span text:style-name="T13">Step 6 : </text:span>In the Payer New Payer screen<text:span text:style-name="T13">. </text:span>Observe the email field place holder.</text:p>
          </table:table-cell>
          <table:table-cell table:style-name="ce44" office:value-type="string" calcext:value-type="string">
            <text:p>Plan Name <text:s text:c="37"/>: 51 Plan 30-01-2026</text:p>
          </table:table-cell>
          <table:table-cell table:style-name="ce46" office:value-type="string" calcext:value-type="string">
            <text:p>The placeholder text "Enter email(s), Separated by commas" should be visible in the email field when it is either empty or after data is removed.</text:p>
          </table:table-cell>
          <table:table-cell table:style-name="ce46" office:value-type="string" calcext:value-type="string">
            <text:p>The placeholder text is missing, leaving the email field blank without instructions.</text:p>
          </table:table-cell>
          <table:table-cell table:style-name="ce44" office:value-type="string" calcext:value-type="string">
            <text:p><text:a xlink:href="https://projects.aithent.com/goto?key=stdbugs&amp;val=187840&amp;group_id=181" xlink:type="simple">#187840</text:a></text:p>
          </table:table-cell>
          <table:table-cell table:style-name="ce44" office:value-type="string" calcext:value-type="string">
            <text:p>P2-Medium </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03" calcext:value-type="date">
            <text:p>2025-02-03</text:p>
          </table:table-cell>
          <table:table-cell office:value-type="string" calcext:value-type="string">
            <text:p>Jitender</text:p>
          </table:table-cell>
          <table:table-cell table:style-name="ce65" office:value-type="string" calcext:value-type="string">
            <text:p>Fixed On Both Side.</text:p>
          </table:table-cell>
          <table:table-cell table:style-name="ce67" table:number-columns-repeated="1006"/>
          <table:table-cell table:number-columns-repeated="4"/>
        </table:table-row>
        <table:table-row table:style-name="ro8">
          <table:table-cell table:style-name="ce37" office:value-type="string" calcext:value-type="string">
            <text:p>TC_15</text:p>
          </table:table-cell>
          <table:table-cell table:style-name="ce40" office:value-type="string" calcext:value-type="string">
            <text:p>Plan <text:s text:c="7"/>: Add New Payer Screen</text:p>
          </table:table-cell>
          <table:table-cell table:style-name="ce45" office:value-type="string" calcext:value-type="string">
            <text:p>Unable to Attach Multiple Emails on "Add New Payer" Page.</text:p>
          </table:table-cell>
          <table:table-cell table:style-name="ce46" office:value-type="string" calcext:value-type="string">
            <text:p><text:span text:style-name="T6">Step 1 : Navigate to "Maintenance" and click on "Plan."</text:span></text:p>
            <text:p><text:span text:style-name="T6">Step 2 : Click on the "Search" button and search for a Plan Name.</text:span></text:p>
            <text:p><text:span text:style-name="T6">Step 3 : From Action Column Click on Payer Button</text:span></text:p>
            <text:p><text:span text:style-name="T6">Step 4 : From Attach New Payer Text Field Click on Advance Search</text:span></text:p>
            <text:p><text:span text:style-name="T6">Step 5 : Click on Add New payer Button.</text:span></text:p>
            <text:p><text:span text:style-name="T13">Step 6 : </text:span><text:span text:style-name="T14">On the "New Payer" screen, observe the behavior of the email field.</text:span></text:p>
          </table:table-cell>
          <table:table-cell table:style-name="ce44" office:value-type="string" calcext:value-type="string">
            <text:p>Plan Name <text:s text:c="37"/>: 51 Plan 30-01-2026</text:p>
          </table:table-cell>
          <table:table-cell table:style-name="ce46" office:value-type="string" calcext:value-type="string">
            <text:p>The email field should accept multiple email addresses, separated by commas (e.g., email1@example.com, email2@example.com).</text:p>
          </table:table-cell>
          <table:table-cell table:style-name="ce46" office:value-type="string" calcext:value-type="string">
            <text:p>The email field does not accept multiple email addresses and fails to accept commas (',') as separators.</text:p>
          </table:table-cell>
          <table:table-cell table:style-name="ce44" office:value-type="string" calcext:value-type="string">
            <text:p><text:a xlink:href="https://projects.aithent.com/goto?key=stdbugs&amp;val=187842&amp;group_id=181" xlink:type="simple">#187842</text:a></text:p>
          </table:table-cell>
          <table:table-cell table:style-name="ce44" office:value-type="string" calcext:value-type="string">
            <text:p>P1-High </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03" calcext:value-type="date">
            <text:p>2025-02-03</text:p>
          </table:table-cell>
          <table:table-cell office:value-type="string" calcext:value-type="string">
            <text:p>Jitender</text:p>
          </table:table-cell>
          <table:table-cell table:style-name="ce65" office:value-type="string" calcext:value-type="string">
            <text:p>51 Fixed But Open 52</text:p>
          </table:table-cell>
          <table:table-cell table:style-name="ce67" table:number-columns-repeated="1006"/>
          <table:table-cell table:number-columns-repeated="4"/>
        </table:table-row>
        <table:table-row table:style-name="ro4">
          <table:table-cell table:style-name="ce37" office:value-type="string" calcext:value-type="string">
            <text:p>TC_16</text:p>
          </table:table-cell>
          <table:table-cell table:style-name="ce40" office:value-type="string" calcext:value-type="string">
            <text:p>Payer <text:s text:c="5"/>: Update Emails</text:p>
          </table:table-cell>
          <table:table-cell table:style-name="ce45" office:value-type="string" calcext:value-type="string">
            <text:p>Unable to Update Payer Record When More Than 9 Emails Are Entered in the Email Field – "Could Not Update" Pop-Up Error</text:p>
          </table:table-cell>
          <table:table-cell table:style-name="ce46" office:value-type="string" calcext:value-type="string">
            <text:p>Step 1 : Navigate to the Maintenance Click on Payer.</text:p>
            <text:p>Step 2 : Click on the search button and search for a specific payer.</text:p>
            <text:p>Step 3 : Click on edit icon and in the email field , enter more then 9 emails (comma-</text:p>
            <text:p>              Separated Or in the appropriate format).</text:p>
            <text:p>Step 4 : Click on update button</text:p>
            <text:p/>
          </table:table-cell>
          <table:table-cell table:style-name="ce44" office:value-type="string" calcext:value-type="string">
            <text:p>Payer Name <text:s text:c="38"/>: Testing Payer</text:p>
          </table:table-cell>
          <table:table-cell table:style-name="ce46" office:value-type="string" calcext:value-type="string">
            <text:p>The system should be allow updating the payer record even when more then 9 emails are entered in the email field , or it should display a clear error message the specifies the email field limit.</text:p>
          </table:table-cell>
          <table:table-cell table:style-name="ce46" office:value-type="string" calcext:value-type="string">
            <text:p>A pop-up appears with the message "Could not update" without any</text:p>
            <text:p>Explanation of why the update failed.</text:p>
          </table:table-cell>
          <table:table-cell table:style-name="ce44" office:value-type="string" calcext:value-type="string">
            <text:p><text:a xlink:href="https://projects.aithent.com/goto?key=stdbugs&amp;val=187926&amp;group_id=181" xlink:type="simple">#187926</text:a></text:p>
          </table:table-cell>
          <table:table-cell table:style-name="ce44" office:value-type="string" calcext:value-type="string">
            <text:p>P1-High </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04" calcext:value-type="date">
            <text:p>2025-02-04</text:p>
          </table:table-cell>
          <table:table-cell office:value-type="string" calcext:value-type="string">
            <text:p>Jitender</text:p>
          </table:table-cell>
          <table:table-cell table:style-name="ce65" office:value-type="string" calcext:value-type="string">
            <text:p>Pending On Both Side.</text:p>
          </table:table-cell>
          <table:table-cell table:style-name="ce67" table:number-columns-repeated="12"/>
          <table:table-cell table:number-columns-repeated="998"/>
        </table:table-row>
        <table:table-row table:style-name="ro2">
          <table:table-cell table:style-name="ce37" office:value-type="string" calcext:value-type="string">
            <text:p>TC_17</text:p>
          </table:table-cell>
          <table:table-cell table:style-name="ce40" office:value-type="string" calcext:value-type="string">
            <text:p>Add New CDM : Plan and <text:s/>CDM Screen</text:p>
          </table:table-cell>
          <table:table-cell table:style-name="ce45" office:value-type="string" calcext:value-type="string">
            <text:p>Service search in 'Add New CDM' shows all services, not just plan-specific ones"</text:p>
          </table:table-cell>
          <table:table-cell table:style-name="ce46" office:value-type="string" calcext:value-type="string">
            <text:p>Step 1 : Navigate to the Maintenance Click on CDM</text:p>
            <text:p>Step 2 : Click on Add New CDM Button </text:p>
            <text:p>Step 3 : Enter the Plan and Select The Service Type </text:p>
            <text:p>Step 4 : Service Name Text field using search service name</text:p>
            <text:p>Step 5 : All services are displayed in the search results, not filtered by the selected plan.</text:p>
          </table:table-cell>
          <table:table-cell table:style-name="ce44" office:value-type="string" calcext:value-type="string">
            <text:p>Plan Name                                             :  Plan 27-02-2025</text:p>
            <text:p>Service Name                                         : Random data search</text:p>
          </table:table-cell>
          <table:table-cell table:style-name="ce46" office:value-type="string" calcext:value-type="string">
            <text:p>Only services under the selected plan should be displayed in the search results.</text:p>
          </table:table-cell>
          <table:table-cell table:style-name="ce46" office:value-type="string" calcext:value-type="string">
            <text:p>The "Service Name" search text field displays all available services, even those not related to the selected plan, instead of only showing services under the chosen plan.</text:p>
          </table:table-cell>
          <table:table-cell table:style-name="ce44" office:value-type="string" calcext:value-type="string">
            <text:p><text:a xlink:href="https://projects.aithent.com/goto?key=stdbugs&amp;val=187942&amp;group_id=181" xlink:type="simple">#187942</text:a></text:p>
          </table:table-cell>
          <table:table-cell table:style-name="ce44" office:value-type="string" calcext:value-type="string">
            <text:p>P1-High </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04" calcext:value-type="date">
            <text:p>2025-02-04</text:p>
          </table:table-cell>
          <table:table-cell office:value-type="string" calcext:value-type="string">
            <text:p>Rajendra</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2">
          <table:table-cell table:style-name="ce37" office:value-type="string" calcext:value-type="string">
            <text:p>TC_18</text:p>
          </table:table-cell>
          <table:table-cell table:style-name="ce40" office:value-type="string" calcext:value-type="string">
            <text:p>Add New CDM : CDM And Plan Screen</text:p>
          </table:table-cell>
          <table:table-cell table:style-name="ce46" office:value-type="string" calcext:value-type="string">
            <text:p>Fields Not Resetting Properly When Pharmacy is De-selected.</text:p>
          </table:table-cell>
          <table:table-cell table:style-name="ce46" office:value-type="string" calcext:value-type="string">
            <text:p><text:span text:style-name="T15">Step 1 : Navigate to the Maintenance Click on CDM.</text:span></text:p>
            <text:p><text:span text:style-name="T15">Step 2 : Click on Add New CDM Button.</text:span></text:p>
            <text:p><text:span text:style-name="T15">Step 3 : Enter or Select Protocol , Payer and Pharmacy.</text:span></text:p>
            <text:p><text:span text:style-name="T15">Step 4 : Choose Service Type then use Advance Search to select a Service Record.</text:span></text:p>
            <text:p><text:span text:style-name="T15">Step 5 : Use CB Name Advance Search Select the CB</text:span></text:p>
            <text:p><text:span text:style-name="T15">Step 6 : Observe that when the CB record is selected, the CB Description and CB Code data </text:span></text:p>
            <text:p><text:span text:style-name="T15">              appear.</text:span></text:p>
            <text:p><text:span text:style-name="T7">Step 7 : De-Select the Pharmacy and Observe CB Description and CB Code Data reset to empty </text:span></text:p>
            <text:p><text:span text:style-name="T7">             but remains fields like CB Name,Discount Per Unit ( flat ) ,(Unit) field ,</text:span></text:p>
            <text:p><text:span text:style-name="T7">             Price eff from date Price eff to date and from date stiil have data</text:span></text:p>
            <text:p><text:span text:style-name="T7">Step 8 : Click on Advance Search again and search for the same CB Name. The CB record is no </text:span></text:p>
            <text:p><text:span text:style-name="T7">              Longer available, indicating that those fields should have been reset.</text:span></text:p>
          </table:table-cell>
          <table:table-cell table:style-name="ce46" office:value-type="string" calcext:value-type="string">
            <text:p>Plan Name                                             : 51 07-02-2025</text:p>
            <text:p>Payer Name                                           : Secondary Payer</text:p>
            <text:p>Pharmacy Name                                     : Testing 51 Pharmacy</text:p>
            <text:p>Service Type                                          : Dispense </text:p>
            <text:p>Service Name                                         : Service Screen1</text:p>
            <text:p>CB Name                                                : 51 07-02-2025 CB</text:p>
          </table:table-cell>
          <table:table-cell table:style-name="ce46" office:value-type="string" calcext:value-type="string">
            <text:p>When the Pharmacy is de-selected, all fields (including CB Name, Discount Per Unit (flat), Unit, Price Eff From Date, Price Eff To Date, and From Date) should reset to empty values, not just CB Description and CB Code.</text:p>
          </table:table-cell>
          <table:table-cell table:style-name="ce46" office:value-type="string" calcext:value-type="string">
            <text:p>When the Pharmacy is de-selected, certain fields remain populated (e.g., CB Name, Discount Per Unit (flat), etc.), leading to inconsistent behavior.</text:p>
          </table:table-cell>
          <table:table-cell table:style-name="ce44" office:value-type="string" calcext:value-type="string">
            <text:p><text:a xlink:href="https://projects.aithent.com/plugins/tracker/?aid=188138" xlink:type="simple">#188138</text:a> </text:p>
          </table:table-cell>
          <table:table-cell table:style-name="ce44" office:value-type="string" calcext:value-type="string">
            <text:p>P1-High </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07" calcext:value-type="date">
            <text:p>2025-02-07</text:p>
          </table:table-cell>
          <table:table-cell office:value-type="string" calcext:value-type="string">
            <text:p>Rajendra</text:p>
          </table:table-cell>
          <table:table-cell table:style-name="ce65" office:value-type="string" calcext:value-type="string">
            <text:p>52 Fixed But Open 51</text:p>
          </table:table-cell>
          <table:table-cell table:style-name="ce67" table:number-columns-repeated="12"/>
          <table:table-cell table:number-columns-repeated="998"/>
        </table:table-row>
        <table:table-row table:style-name="ro2">
          <table:table-cell table:style-name="ce37" office:value-type="string" calcext:value-type="string">
            <text:p>TC_19</text:p>
          </table:table-cell>
          <table:table-cell table:style-name="ce40" office:value-type="string" calcext:value-type="string">
            <text:p>Payer <text:s text:c="5"/>: Email Field</text:p>
          </table:table-cell>
          <table:table-cell table:style-name="ce46" office:value-type="string" calcext:value-type="string">
            <text:p><text:s/>Email field incorrectly accepts multiple commas as separators.</text:p>
          </table:table-cell>
          <table:table-cell table:style-name="ce51" office:value-type="string" calcext:value-type="string">
            <text:p>Step 1 : Navigate to the Maintenance Click on Payer</text:p>
            <text:p>Step 2 : Click on Add New Payer Button</text:p>
            <text:p>Step 3 : Enter the Mandatory fields with Valid Data</text:p>
            <text:p>Step 4 : Enter an email address with multiple commas as separators</text:p>
            <text:p>             (e.g., Pr%akash@gmail.com,,,,,, prakash@#gmail.com).</text:p>
            <text:p>Step 5 : Click on save button</text:p>
          </table:table-cell>
          <table:table-cell table:style-name="ce51" office:value-type="string" calcext:value-type="string">
            <text:p><text:span text:style-name="T7">Account Name                            : 03-02-202512</text:span></text:p>
            <text:p><text:span text:style-name="T7">Email                                          : </text:span><text:span text:style-name="T7"><text:a xlink:href="mailto:Pr%25akash@gmail.com" xlink:type="simple">Pr%akash@gmail.com</text:a></text:span><text:span text:style-name="T7">,,,,,,</text:span></text:p>
            <text:p>                                                     prakash@#gmail.com</text:p>
          </table:table-cell>
          <table:table-cell table:style-name="ce51" office:value-type="string" calcext:value-type="string">
            <text:p>1. The email field should not allow multiple consecutive commas.</text:p>
            <text:p>2. Validation should prevent saving an email with incorrect formatting.</text:p>
          </table:table-cell>
          <table:table-cell table:style-name="ce46" office:value-type="string" calcext:value-type="string">
            <text:p>1. The email field accepts multiple consecutive commas as separators.</text:p>
            <text:p>2. Invalid email addresses can be saved without validation errors.</text:p>
          </table:table-cell>
          <table:table-cell table:style-name="ce44" office:value-type="string" calcext:value-type="string">
            <text:p><text:a xlink:href="https://projects.aithent.com/plugins/tracker/?aid=188347" xlink:type="simple">#188347</text:a> </text:p>
          </table:table-cell>
          <table:table-cell table:style-name="ce44" office:value-type="string" calcext:value-type="string">
            <text:p>P1-High </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0" calcext:value-type="date">
            <text:p>2025-02-10</text:p>
          </table:table-cell>
          <table:table-cell office:value-type="string" calcext:value-type="string">
            <text:p>Jitender</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2">
          <table:table-cell table:style-name="ce37" office:value-type="string" calcext:value-type="string">
            <text:p>TC_20</text:p>
          </table:table-cell>
          <table:table-cell table:style-name="ce40" office:value-type="string" calcext:value-type="string">
            <text:p>CDM Screen : Update All CB Record </text:p>
          </table:table-cell>
          <table:table-cell table:style-name="ce46" office:value-type="string" calcext:value-type="string">
            <text:p>CB Record Update Not Reflecting.</text:p>
          </table:table-cell>
          <table:table-cell table:style-name="ce51" office:value-type="string" calcext:value-type="string">
            <text:p>Step 1 : Navigate to the Maintenance Click on CDM </text:p>
            <text:p>Step 2 : Select Billing Plan Status from  Drop Down Choose All</text:p>
            <text:p>Step 3 : Select the show CB record radio button and Click on search button</text:p>
            <text:p>Step 4 : In the Search text field, enter "CB Name" and in the Action column, click the Edit icon.</text:p>
            <text:p>Step 5 : Update all fields in the CB record and verify that the system allows modifications,</text:p>
            <text:p>Step 6 : Click on the Update button.</text:p>
            <text:p>Step 7 : Reopen the updated CB record and observe the changes.</text:p>
          </table:table-cell>
          <table:table-cell table:style-name="ce51" office:value-type="string" calcext:value-type="string">
            <text:p>Billing Plan Status                      : All</text:p>
            <text:p><text:span text:style-name="T7">CB Name                                    : 52 13-02-2025</text:span></text:p>
          </table:table-cell>
          <table:table-cell table:style-name="ce51" office:value-type="string" calcext:value-type="string">
            <text:p>The updated CB record should reflect the changes after saving.</text:p>
          </table:table-cell>
          <table:table-cell table:style-name="ce46" office:value-type="string" calcext:value-type="string">
            <text:p>The CB record is not updated , the previous values remain unchanged.</text:p>
          </table:table-cell>
          <table:table-cell table:style-name="ce44" office:value-type="string" calcext:value-type="string">
            <text:p><text:a xlink:href="https://projects.aithent.com/goto?key=stdbugs&amp;val=188586&amp;group_id=181" xlink:type="simple">#188586</text:a></text:p>
          </table:table-cell>
          <table:table-cell table:style-name="ce44" office:value-type="string" calcext:value-type="string">
            <text:p>P1-High </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3" calcext:value-type="date">
            <text:p>2025-02-13</text:p>
          </table:table-cell>
          <table:table-cell office:value-type="string" calcext:value-type="string">
            <text:p>Rajendra</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2">
          <table:table-cell table:style-name="ce37" office:value-type="string" calcext:value-type="string">
            <text:p>TC_21</text:p>
          </table:table-cell>
          <table:table-cell table:style-name="ce40" office:value-type="string" calcext:value-type="string">
            <text:p>Work list Search Screen : Protocol Text Field</text:p>
          </table:table-cell>
          <table:table-cell table:style-name="ce46" office:value-type="string" calcext:value-type="string">
            <text:p>Protocol ID Missing in Search Work-list Screen Protocol Text Field.</text:p>
          </table:table-cell>
          <table:table-cell table:style-name="ce51" office:value-type="string" calcext:value-type="string">
            <text:p>Step 1 : Navigate to Maintenance Click on Work list Scheduling </text:p>
            <text:p>Step 2 : Click on Protocol Advance Search </text:p>
            <text:p>Step 3 : Select any one protocol record or a specific protocol from the list.</text:p>
            <text:p>Step 4 : Observe the displayed data.</text:p>
          </table:table-cell>
          <table:table-cell table:style-name="ce51" office:value-type="string" calcext:value-type="string">
            <text:p>Plan Name <text:s text:c="29"/>: Clinical Trial for Drug X (PRO123456)</text:p>
          </table:table-cell>
          <table:table-cell table:style-name="ce51" office:value-type="string" calcext:value-type="string">
            <text:p>Both Protocol Name and Protocol ID data should be displayed in the</text:p>
            <text:p>Search results.</text:p>
          </table:table-cell>
          <table:table-cell table:style-name="ce46" office:value-type="string" calcext:value-type="string">
            <text:p>Only Protocol Name is displayed; Protocol ID is missing.</text:p>
          </table:table-cell>
          <table:table-cell table:style-name="ce44" office:value-type="string" calcext:value-type="string">
            <text:p><text:a xlink:href="https://projects.aithent.com/goto?key=stdbugs&amp;val=188693&amp;group_id=181" xlink:type="simple">#188693</text:a></text:p>
          </table:table-cell>
          <table:table-cell table:style-name="ce44" office:value-type="string" calcext:value-type="string">
            <text:p>P2-Medium</text:p>
          </table:table-cell>
          <table:table-cell table:style-name="ce44" office:value-type="string" calcext:value-type="string">
            <text:p>New</text:p>
          </table:table-cell>
          <table:table-cell table:style-name="ce44" office:value-type="string" calcext:value-type="string">
            <text:p>Prakash Sheri</text:p>
          </table:table-cell>
          <table:table-cell table:style-name="ce60" office:value-type="date" office:date-value="2025-02-14" calcext:value-type="date">
            <text:p>2025-02-14</text:p>
          </table:table-cell>
          <table:table-cell office:value-type="string" calcext:value-type="string">
            <text:p>Jitender</text:p>
          </table:table-cell>
          <table:table-cell table:style-name="ce65" office:value-type="string" calcext:value-type="string">
            <text:p>Pending On Both Side. 52</text:p>
          </table:table-cell>
          <table:table-cell table:style-name="ce67" table:number-columns-repeated="12"/>
          <table:table-cell table:number-columns-repeated="998"/>
        </table:table-row>
        <table:table-row table:style-name="ro2">
          <table:table-cell table:style-name="ce37" office:value-type="string" calcext:value-type="string">
            <text:p>TC_22</text:p>
          </table:table-cell>
          <table:table-cell table:style-name="ce40" office:value-type="string" calcext:value-type="string">
            <text:p>Work list Search Screen : Status</text:p>
          </table:table-cell>
          <table:table-cell table:style-name="ce46" office:value-type="string" calcext:value-type="string">
            <text:p>Worklist search page displays the correct header name for the "Status" drop-down.</text:p>
          </table:table-cell>
          <table:table-cell table:style-name="ce51" office:value-type="string" calcext:value-type="string">
            <text:p>Step 1 : Navigate to Maintenance Click on Work list Scheduling </text:p>
            <text:p>Step 2 :  Observe the Status drop-down.</text:p>
          </table:table-cell>
          <table:table-cell table:style-name="ce51" office:value-type="string" calcext:value-type="string">
            <text:p>NA</text:p>
          </table:table-cell>
          <table:table-cell table:style-name="ce51" office:value-type="string" calcext:value-type="string">
            <text:p>The drop down should be clearly mention “ Worklist status “ instead of</text:p>
            <text:p>Just “ Status “ to avoid confusion.</text:p>
          </table:table-cell>
          <table:table-cell table:style-name="ce46" office:value-type="string" calcext:value-type="string">
            <text:p>Only “ Status “ is displayed , making it unclear whether it refers worklist status or something else.</text:p>
          </table:table-cell>
          <table:table-cell table:style-name="ce44" office:value-type="string" calcext:value-type="string">
            <text:p><text:a xlink:href="https://projects.aithent.com/goto?key=stdbugs&amp;val=188697&amp;group_id=181" xlink:type="simple">#188697</text:a></text:p>
          </table:table-cell>
          <table:table-cell table:style-name="ce44" office:value-type="string" calcext:value-type="string">
            <text:p>P2-Medium</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4" calcext:value-type="date">
            <text:p>2025-02-14</text:p>
          </table:table-cell>
          <table:table-cell office:value-type="string" calcext:value-type="string">
            <text:p>Jitender</text:p>
          </table:table-cell>
          <table:table-cell table:style-name="ce65" office:value-type="string" calcext:value-type="string">
            <text:p>52 Fixed But Open 51</text:p>
          </table:table-cell>
          <table:table-cell table:style-name="ce67" table:number-columns-repeated="12"/>
          <table:table-cell table:number-columns-repeated="998"/>
        </table:table-row>
        <table:table-row table:style-name="ro2">
          <table:table-cell table:style-name="ce37" office:value-type="string" calcext:value-type="string">
            <text:p>TC_23</text:p>
          </table:table-cell>
          <table:table-cell table:style-name="ce40" office:value-type="string" calcext:value-type="string">
            <text:p>Search Worklist Result : Protocol ID Column</text:p>
          </table:table-cell>
          <table:table-cell table:style-name="ce46" office:value-type="string" calcext:value-type="string">
            <text:p>Protocol ID column displays data correctly in the Worklist search results.</text:p>
          </table:table-cell>
          <table:table-cell table:style-name="ce51" office:value-type="string" calcext:value-type="string">
            <text:p>Step 1 : Navigate to Maintenance Click on Work list Scheduling </text:p>
            <text:p>Step 2 : Click on Search Button.</text:p>
            <text:p>Step 3 : Observe the Protocol ID column in the search results.</text:p>
          </table:table-cell>
          <table:table-cell table:style-name="ce51" office:value-type="string" calcext:value-type="string">
            <text:p>NA</text:p>
          </table:table-cell>
          <table:table-cell table:style-name="ce51" office:value-type="string" calcext:value-type="string">
            <text:p>The Protocol ID column should display the correct data for each record.</text:p>
          </table:table-cell>
          <table:table-cell table:style-name="ce46" office:value-type="string" calcext:value-type="string">
            <text:p>The Protocol ID column data is missing.</text:p>
          </table:table-cell>
          <table:table-cell table:style-name="ce44" office:value-type="string" calcext:value-type="string">
            <text:p><text:a xlink:href="https://projects.aithent.com/goto?key=stdbugs&amp;val=188702&amp;group_id=181" xlink:type="simple">#188702</text:a></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4" calcext:value-type="date">
            <text:p>2025-02-14</text:p>
          </table:table-cell>
          <table:table-cell office:value-type="string" calcext:value-type="string">
            <text:p>Jitender</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2">
          <table:table-cell table:style-name="ce37" office:value-type="string" calcext:value-type="string">
            <text:p>TC_24</text:p>
          </table:table-cell>
          <table:table-cell table:style-name="ce40" office:value-type="string" calcext:value-type="string">
            <text:p>Search Worklist Result : Check Box</text:p>
          </table:table-cell>
          <table:table-cell table:style-name="ce46" office:value-type="string" calcext:value-type="string">
            <text:p>Deselected automatically selected check box performed any action Search Worklist Result page.</text:p>
          </table:table-cell>
          <table:table-cell table:style-name="ce51" office:value-type="string" calcext:value-type="string">
            <text:p>Step 1 : Navigate to Maintenance Click on Work list Scheduling </text:p>
            <text:p>Step 2 : Click on Search Button.</text:p>
            <text:p>Step 3 : Select all check box.</text:p>
            <text:p>Step 4 : Apply any filter, navigate to a different page, or perform any action </text:p>
            <text:p>             (e.g., clicking on a page number)</text:p>
          </table:table-cell>
          <table:table-cell table:style-name="ce51" office:value-type="string" calcext:value-type="string">
            <text:p>NA</text:p>
          </table:table-cell>
          <table:table-cell table:style-name="ce51" office:value-type="string" calcext:value-type="string">
            <text:p>The selected checkboxes should remain selected, even after performing</text:p>
            <text:p>An action like applying a filter or navigating.</text:p>
          </table:table-cell>
          <table:table-cell table:style-name="ce46" office:value-type="string" calcext:value-type="string">
            <text:p>The selected checkboxes get deselected automatically after performing any action.</text:p>
          </table:table-cell>
          <table:table-cell table:style-name="ce44" office:value-type="string" calcext:value-type="string">
            <text:p><text:a xlink:href="https://projects.aithent.com/plugins/tracker/?aid=188823" xlink:type="simple">#188823</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7" calcext:value-type="date">
            <text:p>2025-02-17</text:p>
          </table:table-cell>
          <table:table-cell office:value-type="string" calcext:value-type="string">
            <text:p>Jitender</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2">
          <table:table-cell table:style-name="ce37" office:value-type="string" calcext:value-type="string">
            <text:p>TC_25</text:p>
          </table:table-cell>
          <table:table-cell table:style-name="ce40" office:value-type="string" calcext:value-type="string">
            <text:p>Search Worklist Job : Pop message</text:p>
          </table:table-cell>
          <table:table-cell table:style-name="ce46" office:value-type="string" calcext:value-type="string">
            <text:p>Incorrect pop up message in search work-list job page.</text:p>
          </table:table-cell>
          <table:table-cell table:style-name="ce51" office:value-type="string" calcext:value-type="string">
            <text:p>Step 1 : Navigate to Maintenance Click on Work list Scheduling.</text:p>
            <text:p>Step 2 : Click on Search Button.</text:p>
            <text:p>Step 3 : Click on search text field and Search The protocol Name.</text:p>
            <text:p>Step 4 : Click on edit icon. </text:p>
            <text:p>Step 5 : Click on show work-list job button.</text:p>
            <text:p>Step 6 : Click on Change Status button without selecting any checkbox.</text:p>
            <text:p>Step 7 : Observe the pop-up message.</text:p>
          </table:table-cell>
          <table:table-cell table:style-name="ce51" office:value-type="string" calcext:value-type="string">
            <text:p><text:span text:style-name="T7">Protocol Name                                         : 12-02-2025</text:span></text:p>
          </table:table-cell>
          <table:table-cell table:style-name="ce51" office:value-type="string" calcext:value-type="string">
            <text:p>Please select at least one record pop should be display.</text:p>
          </table:table-cell>
          <table:table-cell table:style-name="ce46" office:value-type="string" calcext:value-type="string">
            <text:p>The pop-up message is incorrect and displays: "Pleas Select Atleast One Record." (spelling and grammar issues).</text:p>
          </table:table-cell>
          <table:table-cell table:style-name="ce44" office:value-type="string" calcext:value-type="string">
            <text:p><text:a xlink:href="https://projects.aithent.com/goto?key=stdbugs&amp;val=188827&amp;group_id=181" xlink:type="simple">#188827</text:a></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7" calcext:value-type="date">
            <text:p>2025-02-17</text:p>
          </table:table-cell>
          <table:table-cell office:value-type="string" calcext:value-type="string">
            <text:p>Jitender</text:p>
          </table:table-cell>
          <table:table-cell table:style-name="ce65" office:value-type="string" calcext:value-type="string">
            <text:p>51 Fixed But Open 52</text:p>
          </table:table-cell>
          <table:table-cell table:style-name="ce67" table:number-columns-repeated="12"/>
          <table:table-cell table:number-columns-repeated="998"/>
        </table:table-row>
        <table:table-row table:style-name="ro2">
          <table:table-cell table:style-name="ce37" office:value-type="string" calcext:value-type="string">
            <text:p>TC_26</text:p>
          </table:table-cell>
          <table:table-cell table:style-name="ce40" office:value-type="string" calcext:value-type="string">
            <text:p>Search Worklist Job : Unwanted fields </text:p>
          </table:table-cell>
          <table:table-cell table:style-name="ce46" office:value-type="string" calcext:value-type="string">
            <text:p>Minimizing the Search Worklist Result page unwanted fields are display.</text:p>
            <text:p/>
          </table:table-cell>
          <table:table-cell table:style-name="ce51" office:value-type="string" calcext:value-type="string">
            <text:p>Step 1 : Navigate to the Maintenance click on Work-list Scheduling </text:p>
            <text:p>Step 2 : Click on search button.</text:p>
            <text:p>Step 3 : Click on minimize  icon. </text:p>
            <text:p>Step 4 : Observe the displayed fields.</text:p>
          </table:table-cell>
          <table:table-cell table:style-name="ce51" office:value-type="string" calcext:value-type="string">
            <text:p>NA</text:p>
          </table:table-cell>
          <table:table-cell table:style-name="ce51" office:value-type="string" calcext:value-type="string">
            <text:p>When minimizing, only relevant fields should be visible. Unnecessary </text:p>
            <text:p>Buttons should be hidden.</text:p>
          </table:table-cell>
          <table:table-cell table:style-name="ce46" office:value-type="string" calcext:value-type="string">
            <text:p>The following unwanted fields/buttons are still displayed:</text:p>
            <text:p>Export in PDF button , View/Print button and Change Status button</text:p>
          </table:table-cell>
          <table:table-cell table:style-name="ce44" office:value-type="string" calcext:value-type="string">
            <text:p><text:a xlink:href="https://projects.aithent.com/goto?key=stdbugs&amp;val=188829&amp;group_id=181" xlink:type="simple">#188829</text:a></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7" calcext:value-type="date">
            <text:p>2025-02-17</text:p>
          </table:table-cell>
          <table:table-cell office:value-type="string" calcext:value-type="string">
            <text:p>Jitender</text:p>
          </table:table-cell>
          <table:table-cell table:style-name="ce65" office:value-type="string" calcext:value-type="string">
            <text:p>51 Fixed But Open 52</text:p>
          </table:table-cell>
          <table:table-cell table:style-name="ce67" table:number-columns-repeated="12"/>
          <table:table-cell table:number-columns-repeated="998"/>
        </table:table-row>
        <table:table-row table:style-name="ro2">
          <table:table-cell table:style-name="ce37" office:value-type="string" calcext:value-type="string">
            <text:p>TC_27</text:p>
          </table:table-cell>
          <table:table-cell table:style-name="ce40" office:value-type="string" calcext:value-type="string">
            <text:p>Review Charge Search : Footer incorrect </text:p>
          </table:table-cell>
          <table:table-cell table:style-name="ce46" office:value-type="string" calcext:value-type="string">
            <text:p>Footer Displayed in the Middle of the Screen Instead of Bottom.</text:p>
          </table:table-cell>
          <table:table-cell table:style-name="ce51" office:value-type="string" calcext:value-type="string">
            <text:p>Step 1 : Navigate to the Maintenance Click on Review Charges</text:p>
            <text:p>Step 2 : Observe the footer text:</text:p>
            <text:p>     "Universal Billing and Accounts Receivable. Copyright © 2025. All rights reserved. V1.0.52"</text:p>
            <text:p>Step 3 : Notice that the footer appears in the middle of the screen instead of at the bottom.</text:p>
          </table:table-cell>
          <table:table-cell table:style-name="ce51" office:value-type="string" calcext:value-type="string">
            <text:p>NA</text:p>
          </table:table-cell>
          <table:table-cell table:style-name="ce51" office:value-type="string" calcext:value-type="string">
            <text:p>The footer should be displayed at the bottom of the screen as per UI</text:p>
            <text:p>Standards. </text:p>
          </table:table-cell>
          <table:table-cell table:style-name="ce46" office:value-type="string" calcext:value-type="string">
            <text:p>The footer appears in the middle of the screen, affecting the layout and user experience.</text:p>
          </table:table-cell>
          <table:table-cell table:style-name="ce44" office:value-type="string" calcext:value-type="string">
            <text:p><text:a xlink:href="https://projects.aithent.com/goto?key=stdbugs&amp;val=188831&amp;group_id=181" xlink:type="simple">#188831</text:a></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7" calcext:value-type="date">
            <text:p>2025-02-17</text:p>
          </table:table-cell>
          <table:table-cell office:value-type="string" calcext:value-type="string">
            <text:p>Rajendra</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3">
          <table:table-cell table:style-name="ce37" office:value-type="string" calcext:value-type="string">
            <text:p>TC_28</text:p>
          </table:table-cell>
          <table:table-cell table:style-name="ce41" office:value-type="string" calcext:value-type="string">
            <text:p>Plan and CDM Screen : Reset Data</text:p>
          </table:table-cell>
          <table:table-cell table:style-name="ce41" office:value-type="string" calcext:value-type="string">
            <text:p>Fields Not Resetting After Changing "Pull Pricing details from CB Pricing" Drop Down.</text:p>
          </table:table-cell>
          <table:table-cell table:style-name="ce41" office:value-type="string" calcext:value-type="string">
            <text:p>Step 1 : Navigate to the Maintenance Click on CDM </text:p>
            <text:p>Step 2 : Click on Add New CDM Button</text:p>
            <text:p><text:span text:style-name="T7">Step 3 : Enter the Protocol and Select the Service Type from the </text:span>drop down </text:p>
            <text:p>Step 4 : In the Pull Pricing details from CB Pricing drop down select the option “ Yes “</text:p>
            <text:p>Step 5 : Click on CB Name Advanced Search and use the Search Text Field to Search the </text:p>
            <text:p>               CB Name.</text:p>
            <text:p>Step 6 : Select the CB Record from the CB column by clicking the link.</text:p>
            <text:p><text:span text:style-name="T7">Step 7 : Change the Pull Pricing details from CB Pricing drop-down option from “ Yes to No. “</text:span></text:p>
            <text:p/>
          </table:table-cell>
          <table:table-cell table:style-name="ce41" office:value-type="string" calcext:value-type="string">
            <text:p>Protocol Name                                         : 14-02-2025</text:p>
            <text:p>Service Type                                             : Dispense </text:p>
            <text:p>Pull Pricing details from CB Pricing?       : Yes</text:p>
            <text:p>CB Name                                                   : 14-02-2025 WL CB</text:p>
            <text:p/>
          </table:table-cell>
          <table:table-cell table:style-name="ce41" office:value-type="string" calcext:value-type="string">
            <text:p>All fields should be reset to empty, except for the following fields:</text:p>
            <text:p>Discount Per Unit (Flat) , Discount Per Unit (%) and Tax Type ,</text:p>
            <text:p>Tax (%) fields.</text:p>
          </table:table-cell>
          <table:table-cell table:style-name="ce41" office:value-type="string" calcext:value-type="string">
            <text:p>The Discount Per Unit (Flat), Discount Per Unit (%), Tax Type, and Tax (%) fields </text:p>
            <text:p>retain their previous data even though other fields are reset.</text:p>
          </table:table-cell>
          <table:table-cell table:style-name="ce44" office:value-type="string" calcext:value-type="string">
            <text:p><text:a xlink:href="https://projects.aithent.com/plugins/tracker/?aid=188961" xlink:type="simple">#188961</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8" calcext:value-type="date">
            <text:p>2025-02-18</text:p>
          </table:table-cell>
          <table:table-cell office:value-type="string" calcext:value-type="string">
            <text:p>Yash</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5">
          <table:table-cell table:style-name="ce37" office:value-type="string" calcext:value-type="string">
            <text:p>TC_29</text:p>
          </table:table-cell>
          <table:table-cell table:style-name="ce41" office:value-type="string" calcext:value-type="string">
            <text:p>CDM Screen   : Edit Icon on Service</text:p>
            <text:p>                         Information </text:p>
          </table:table-cell>
          <table:table-cell table:style-name="ce41" office:value-type="string" calcext:value-type="string">
            <text:p>Incorrect Tooltip Displayed for Service Name Edit Icon.</text:p>
          </table:table-cell>
          <table:table-cell table:style-name="ce41" office:value-type="string" calcext:value-type="string">
            <text:p>Step 1 : Navigate to the Maintenance Click on CDM </text:p>
            <text:p>Step 2 : Click on Search text field and search the CDM record </text:p>
            <text:p><text:span text:style-name="T7">Step 3 : From the service information section cursor move on edit icon </text:span>service master</text:p>
            <text:p>Step 4 : Observe the that icon showing edit cb but it display edit service master</text:p>
          </table:table-cell>
          <table:table-cell table:style-name="ce41" office:value-type="string" calcext:value-type="string">
            <text:p>CB Name <text:s text:c="47"/>: Protocol_2023 </text:p>
          </table:table-cell>
          <table:table-cell table:style-name="ce41" office:value-type="string" calcext:value-type="string">
            <text:p>The tooltip should display "Edit Service Master".</text:p>
          </table:table-cell>
          <table:table-cell table:style-name="ce41" office:value-type="string" calcext:value-type="string">
            <text:p>The tooltip incorrectly displays "Edit CB" instead of "Edit Service Master".</text:p>
          </table:table-cell>
          <table:table-cell table:style-name="ce44" office:value-type="string" calcext:value-type="string">
            <text:p><text:a xlink:href="https://projects.aithent.com/plugins/tracker/?aid=189020" xlink:type="simple">#189020</text:a> </text:p>
          </table:table-cell>
          <table:table-cell table:style-name="ce44" office:value-type="string" calcext:value-type="string">
            <text:p>P2-Medium</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9" calcext:value-type="date">
            <text:p>2025-02-19</text:p>
          </table:table-cell>
          <table:table-cell office:value-type="string" calcext:value-type="string">
            <text:p>Neelam</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2">
          <table:table-cell table:style-name="ce37" office:value-type="string" calcext:value-type="string">
            <text:p>TC_30</text:p>
          </table:table-cell>
          <table:table-cell table:style-name="ce40" office:value-type="string" calcext:value-type="string">
            <text:p>Work list : Edit icon</text:p>
          </table:table-cell>
          <table:table-cell table:style-name="ce46" office:value-type="string" calcext:value-type="string">
            <text:p>Resource Failure and Transaction Exception When Updating Inactive Worklist</text:p>
          </table:table-cell>
          <table:table-cell table:style-name="ce41" office:value-type="string" calcext:value-type="string">
            <text:p>Step 1 : Navigate to the Maintenance Click on Worklist Scheduler </text:p>
            <text:p>Step 2 : Click on Add New Work-List button</text:p>
            <text:p>Step 3 : Create a new work-list with Inactive status.</text:p>
            <text:p>Step 4 : Reopen the created inactive work-list.</text:p>
            <text:p>Step 5 : Try to modify the inactive to active work-list.</text:p>
            <text:p>Step 6 : Observe the Frontend Resource Failure and Eclipse Transaction Exception.</text:p>
          </table:table-cell>
          <table:table-cell table:style-name="ce51" office:value-type="string" calcext:value-type="string">
            <text:p>Work-list Name <text:s text:c="28"/>: 14-02-2025 WL-WL1770</text:p>
          </table:table-cell>
          <table:table-cell table:style-name="ce41" office:value-type="string" calcext:value-type="string">
            <text:p>The inactive work-list should be created without any error and should be </text:p>
            <text:p>Modifiable.</text:p>
          </table:table-cell>
          <table:table-cell table:style-name="ce41" office:value-type="string" calcext:value-type="string">
            <text:p>Resource failure occurs when trying to modify the inactive work-list.</text:p>
            <text:p>Transaction Exception is thrown in Eclipse.</text:p>
          </table:table-cell>
          <table:table-cell table:style-name="ce44" office:value-type="string" calcext:value-type="string">
            <text:p><text:a xlink:href="https://projects.aithent.com/goto?key=stdbugs&amp;val=189028&amp;group_id=181" xlink:type="simple">#189028</text:a></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19" calcext:value-type="date">
            <text:p>2025-02-19</text:p>
          </table:table-cell>
          <table:table-cell office:value-type="string" calcext:value-type="string">
            <text:p>Jitender</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4">
          <table:table-cell table:style-name="ce37" office:value-type="string" calcext:value-type="string">
            <text:p>TC_31</text:p>
          </table:table-cell>
          <table:table-cell table:style-name="ce40" office:value-type="string" calcext:value-type="string">
            <text:p>Receive Payment : Reset Add Received Payment</text:p>
          </table:table-cell>
          <table:table-cell table:style-name="ce46" office:value-type="string" calcext:value-type="string">
            <text:p>Received Payment Page Does Not Reset or Update After Saving.</text:p>
          </table:table-cell>
          <table:table-cell table:style-name="ce41" office:value-type="string" calcext:value-type="string">
            <text:p>Step 1 : Navigate to the A/R Click on Received Payment</text:p>
            <text:p>Step 2 : Click on Add New Received Payment Button</text:p>
            <text:p>Step 3 : Fill Mandatory fields Click on save button</text:p>
            <text:p>Step 4 : Fill in the mandatory fields and click Save.</text:p>
          </table:table-cell>
          <table:table-cell table:style-name="ce51" office:value-type="string" calcext:value-type="string">
            <text:p>Payer Name <text:s text:c="38"/>: 11-01-2025 Acc Name (11-01-2025 Acc)</text:p>
          </table:table-cell>
          <table:table-cell table:style-name="ce41" office:value-type="string" calcext:value-type="string">
            <text:p>1. After clicking the Save button, the page should either reset or a new</text:p>
            <text:p>"Add New Received Payment" page should open.</text:p>
            <text:p>2. The page title should change accordingly: When adding a new received </text:p>
            <text:p>payment, the page title should be "Add New Received Payment". If the</text:p>
            <text:p>Page is being used to update a payment, the title should change to "Edit or </text:p>
            <text:p>Update Received Payment".</text:p>
          </table:table-cell>
          <table:table-cell table:style-name="ce41" office:value-type="string" calcext:value-type="string">
            <text:p>1. After clicking Save, the current page remains open, showing the </text:p>
            <text:p>    Created received payment. The page does not reset or open a new </text:p>
            <text:p>     Instance for adding another payment.</text:p>
            <text:p>2. The page title remains the same (it doesn't change to "Edit or </text:p>
            <text:p>     Update Received Payment").</text:p>
          </table:table-cell>
          <table:table-cell table:style-name="ce44" office:value-type="string" calcext:value-type="string">
            <text:p><text:a xlink:href="https://projects.aithent.com/goto?key=stdbugs&amp;val=189159&amp;group_id=181" xlink:type="simple">#189159</text:a></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21" calcext:value-type="date">
            <text:p>2025-02-21</text:p>
          </table:table-cell>
          <table:table-cell office:value-type="string" calcext:value-type="string">
            <text:p>Sandeep</text:p>
          </table:table-cell>
          <table:table-cell table:style-name="ce65" office:value-type="string" calcext:value-type="string">
            <text:p>52 Fixed But Open 51</text:p>
          </table:table-cell>
          <table:table-cell table:style-name="ce67" table:number-columns-repeated="12"/>
          <table:table-cell table:number-columns-repeated="998"/>
        </table:table-row>
        <table:table-row table:style-name="ro7">
          <table:table-cell table:style-name="ce37" office:value-type="string" calcext:value-type="string">
            <text:p>TC_32</text:p>
          </table:table-cell>
          <table:table-cell table:style-name="ce40" office:value-type="string" calcext:value-type="string">
            <text:p>CDM Search : Payer Place Holder</text:p>
          </table:table-cell>
          <table:table-cell table:style-name="ce46" office:value-type="string" calcext:value-type="string">
            <text:p>Missing Place-Holders in Payer Advance Search on CDM Search Screen.</text:p>
          </table:table-cell>
          <table:table-cell table:style-name="ce41" office:value-type="string" calcext:value-type="string">
            <text:p>Step 1 : Navigate to the Maintenance Click on CDM </text:p>
            <text:p>Step 2 : Click on Advanced Search in the Payer text field.</text:p>
            <text:p>Step 3 : Observe the text fields and drop-downs in the Advanced Search section.</text:p>
          </table:table-cell>
          <table:table-cell table:style-name="ce51" office:value-type="string" calcext:value-type="string">
            <text:p>NA</text:p>
          </table:table-cell>
          <table:table-cell table:style-name="ce41" office:value-type="string" calcext:value-type="string">
            <text:p>All text fields and dropdowns should have proper placeholders to indicate </text:p>
            <text:p>Expected input.</text:p>
          </table:table-cell>
          <table:table-cell table:style-name="ce41" office:value-type="string" calcext:value-type="string">
            <text:p>Placeholders are missing in all text fields and dropdowns in the Advanced Search</text:p>
            <text:p>Section.</text:p>
          </table:table-cell>
          <table:table-cell table:style-name="ce44" office:value-type="string" calcext:value-type="string">
            <text:p><text:a xlink:href="https://projects.aithent.com/plugins/tracker/?aid=189336" xlink:type="simple">#189336</text:a> </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24" calcext:value-type="date">
            <text:p>2025-02-24</text:p>
          </table:table-cell>
          <table:table-cell office:value-type="string" calcext:value-type="string">
            <text:p>Neelam</text:p>
          </table:table-cell>
          <table:table-cell table:style-name="ce65" office:value-type="string" calcext:value-type="string">
            <text:p>Fixed On Both Side.</text:p>
          </table:table-cell>
          <table:table-cell table:style-name="ce67" table:number-columns-repeated="12"/>
          <table:table-cell table:number-columns-repeated="998"/>
        </table:table-row>
        <table:table-row table:style-name="ro7">
          <table:table-cell table:style-name="ce37" office:value-type="string" calcext:value-type="string">
            <text:p>TC_33</text:p>
          </table:table-cell>
          <table:table-cell table:style-name="ce40" office:value-type="string" calcext:value-type="string">
            <text:p><text:span text:style-name="T1">Plan and CDM Screen : </text:span><text:span text:style-name="T5">Pull Pricing details from </text:span></text:p>
            <text:p><text:span text:style-name="T6">                                      CB Pricing? </text:span></text:p>
          </table:table-cell>
          <table:table-cell table:style-name="ce46" office:value-type="string" calcext:value-type="string">
            <text:p>Incorrect Default Selection for "Pull Pricing details from CB Pricing?"</text:p>
          </table:table-cell>
          <table:table-cell table:style-name="ce41" office:value-type="string" calcext:value-type="string">
            <text:p>Step 1 : Navigate to the Maintenance Click on CDM and Plan</text:p>
            <text:p>Step 2 : On both screen access CDM Screen </text:p>
            <text:p>Step 3 : Observe the default value of "Pull Pricing details from CB Pricing?".</text:p>
          </table:table-cell>
          <table:table-cell table:style-name="ce51" office:value-type="string" calcext:value-type="string">
            <text:p>NA</text:p>
          </table:table-cell>
          <table:table-cell table:style-name="ce41" office:value-type="string" calcext:value-type="string">
            <text:p>The field should be set to "Yes" by default (or as per the expected </text:p>
            <text:p>Business rule).</text:p>
          </table:table-cell>
          <table:table-cell table:style-name="ce41" office:value-type="string" calcext:value-type="string">
            <text:p>The field is set to "No" by default instead of "Yes" when first opening the screen.</text:p>
          </table:table-cell>
          <table:table-cell table:style-name="ce44" office:value-type="string" calcext:value-type="string">
            <text:p><text:a xlink:href="https://projects.aithent.com/goto?key=stdbugs&amp;val=189357&amp;group_id=181" xlink:type="simple">#189357</text:a></text:p>
          </table:table-cell>
          <table:table-cell table:style-name="ce44" office:value-type="string" calcext:value-type="string">
            <text:p>P-1 High</text:p>
          </table:table-cell>
          <table:table-cell table:style-name="ce44" office:value-type="string" calcext:value-type="string">
            <text:p>Closed</text:p>
          </table:table-cell>
          <table:table-cell table:style-name="ce44" office:value-type="string" calcext:value-type="string">
            <text:p>Prakash Sheri</text:p>
          </table:table-cell>
          <table:table-cell table:style-name="ce60" office:value-type="date" office:date-value="2025-02-24" calcext:value-type="date">
            <text:p>2025-02-24</text:p>
          </table:table-cell>
          <table:table-cell office:value-type="string" calcext:value-type="string">
            <text:p>Yash</text:p>
          </table:table-cell>
          <table:table-cell table:style-name="ce65" office:value-type="string" calcext:value-type="string">
            <text:p>51 Fixed But Open 52</text:p>
          </table:table-cell>
          <table:table-cell table:style-name="ce67" table:number-columns-repeated="12"/>
          <table:table-cell table:number-columns-repeated="998"/>
        </table:table-row>
        <table:table-row table:style-name="ro9">
          <table:table-cell table:style-name="ce37" office:value-type="string" calcext:value-type="string">
            <text:p>TC_34</text:p>
          </table:table-cell>
          <table:table-cell table:style-name="ce40" office:value-type="string" calcext:value-type="string">
            <text:p>CDM and Plan Screen : Dataflow</text:p>
          </table:table-cell>
          <table:table-cell table:style-name="ce46" office:value-type="string" calcext:value-type="string">
            <text:p>CDM and Plan Screen – Pricing Information Fields Not Updating with CB Record Data.</text:p>
          </table:table-cell>
          <table:table-cell table:style-name="ce52" office:value-type="string" calcext:value-type="string">
            <text:p><text:span text:style-name="T7">Step 1 : Navigate to the Maintenance Click on CDM and Plan</text:span></text:p>
            <text:p><text:span text:style-name="T7">Step 2 : Access both CDM and Plan screens.</text:span></text:p>
            <text:p><text:span text:style-name="T7">Step 3 : Select a Service Type and enter a Service Name in the text field.</text:span></text:p>
            <text:p><text:span text:style-name="T7">Step 4 : Choose a service record from the drop-down.</text:span></text:p>
            <text:p><text:span text:style-name="T7">Step 5 : Observe the Pricing Information section.</text:span></text:p>
          </table:table-cell>
          <table:table-cell table:style-name="ce54" office:value-type="string" calcext:value-type="string">
            <text:p><text:span text:style-name="T7">Protocol Name                                    : 52 28-02-2025 Plan </text:span></text:p>
            <text:p><text:span text:style-name="T7">Service Type                                        : Processing-R</text:span></text:p>
            <text:p><text:span text:style-name="T7">Service Name                                      : 24CB1</text:span></text:p>
          </table:table-cell>
          <table:table-cell table:style-name="ce41" office:value-type="string" calcext:value-type="string">
            <text:p>When selecting a service record, the CB Record Data should populate all </text:p>
            <text:p>relevant fields, including : Discount Per Unit (Flat) , Discount Per Unit (%)</text:p>
            <text:p>And Tax Type , Tax (%)</text:p>
          </table:table-cell>
          <table:table-cell table:style-name="ce41" office:value-type="string" calcext:value-type="string">
            <text:p>When selecting a service type and entering a service name in the CDM and Plan </text:p>
            <text:p>Screens, the Pricing Information section does not populate the following fields from</text:p>
            <text:p>the CB record : Discount Per Unit (Flat) , Discount Per Unit (%) and Tax Type ,</text:p>
            <text:p>Tax (%)</text:p>
          </table:table-cell>
          <table:table-cell table:style-name="ce44" office:value-type="string" calcext:value-type="string">
            <text:p><text:a xlink:href="https://projects.aithent.com/goto?key=stdbugs&amp;val=189361&amp;group_id=181" xlink:type="simple">#189361</text:a></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2-24" calcext:value-type="date">
            <text:p>2025-02-24</text:p>
          </table:table-cell>
          <table:table-cell office:value-type="string" calcext:value-type="string">
            <text:p>Yash</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6">
          <table:table-cell table:style-name="ce37" office:value-type="string" calcext:value-type="string">
            <text:p>TC_35</text:p>
          </table:table-cell>
          <table:table-cell table:style-name="ce41" office:value-type="string" calcext:value-type="string">
            <text:p>Plan Screen : Add New CDM Fileds</text:p>
          </table:table-cell>
          <table:table-cell table:style-name="ce41" office:value-type="string" calcext:value-type="string">
            <text:p>Mandatory Fields Display "Please Enter Valid" even fields are contained data or value.</text:p>
          </table:table-cell>
          <table:table-cell table:style-name="ce41" office:value-type="string" calcext:value-type="string">
            <text:p>Step 1 : Navigate to the Maintenance Click on Plan and CDM Screen Both.</text:p>
            <text:p>Step 2 : Click on search button , search for a plan in the search text field.</text:p>
            <text:p>Step 3 : Click on Services in the Action Column</text:p>
            <text:p>Step 4 : Click on Add New CDM Button</text:p>
            <text:p>Step 5 : Click on save button before entering any values or data in mandatory fields </text:p>
            <text:p>Step 6 : Select the Service Type , On Service Name Click on Advance Search and Select the </text:p>
            <text:p>            Service Record</text:p>
            <text:p>Step 7 : Fill in the remaining fields.</text:p>
            <text:p>Step 8 : Observe that some mandatory fields incorrectly display "Please Enter Value", </text:p>
            <text:p>             Even though they contain valid data.</text:p>
          </table:table-cell>
          <table:table-cell table:style-name="ce41" office:value-type="string" calcext:value-type="string">
            <text:p>NA</text:p>
          </table:table-cell>
          <table:table-cell table:style-name="ce41" office:value-type="string" calcext:value-type="string">
            <text:p>Some mandatory fields still show the "Please Enter Value" error message </text:p>
            <text:p>Despite containing valid data.</text:p>
          </table:table-cell>
          <table:table-cell table:style-name="ce41" office:value-type="string" calcext:value-type="string">
            <text:p>The system should recognize the entered values, and mandatory field</text:p>
            <text:p>Validation should only trigger when a required field is left empty.</text:p>
          </table:table-cell>
          <table:table-cell table:style-name="ce44" office:value-type="string" calcext:value-type="string">
            <text:p><text:a xlink:href="https://projects.aithent.com/plugins/tracker/?aid=189586" xlink:type="simple">#189586</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2-27" calcext:value-type="date">
            <text:p>2025-02-27</text:p>
          </table:table-cell>
          <table:table-cell table:style-name="ce41" office:value-type="string" calcext:value-type="string">
            <text:p>Neelam</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10">
          <table:table-cell table:style-name="ce37" office:value-type="string" calcext:value-type="string">
            <text:p>TC_36</text:p>
          </table:table-cell>
          <table:table-cell table:style-name="ce42" office:value-type="string" calcext:value-type="string">
            <text:p>Plan and CDM Screen : Mandatory fields</text:p>
          </table:table-cell>
          <table:table-cell table:style-name="ce41" office:value-type="string" calcext:value-type="string">
            <text:p>Mandatory Fields Incorrectly Display "Please Enter Value" Despite Containing Data.</text:p>
          </table:table-cell>
          <table:table-cell table:style-name="ce42" office:value-type="string" calcext:value-type="string">
            <text:p>Step 1 : Using the Maintenance Module, access the Add New CDM screen on both Plan and</text:p>
            <text:p>             CDM sides.</text:p>
            <text:p>Step 2 : Without filling in the mandatory fields, click on the Save button.</text:p>
            <text:p>Step 3 : Click on the Close (X) icon or Cancel button to exit CDM Screen, then reopen the</text:p>
            <text:p>             Add New CDM Screen.</text:p>
            <text:p>             Observe: Mandatory fields still display "Please Enter Value" despite reopening.</text:p>
            <text:p>Step 4 : Again, try to Add New CDM without filling in the mandatory fields and click on the</text:p>
            <text:p>              Save button.</text:p>
            <text:p>Step 5 : Click on the Create a Charge Basis record checkbox and immediately deselect it.</text:p>
            <text:p>            Observe : The Price Type (Charge Basis) field still displays "Please Enter Value" on </text:p>
            <text:p>             both Plan and CDM screens.</text:p>
            <text:p>Step 6 : Using the Plan and CDM Screen, access the Update/Edit CDM screen.</text:p>
            <text:p>Step 7 : In the Edit Service Master Screen, remove the data from a mandatory field and click </text:p>
            <text:p>             Cancel or (X) icon</text:p>
            <text:p>Step 8 : Reopen the Edit Service Master Screen.</text:p>
            <text:p>            Observe : The mandatory field still contains data but incorrectly displays </text:p>
            <text:p>           "Please Enter Value" on both Plan and CDM screens.</text:p>
            <text:p>Step 9 : The same issue occurs when Editing Charge Basis (CB):</text:p>
            <text:p>Step 10 : Clicking Cancel or reopening via (X) icon causes mandatory fields to incorrectly </text:p>
            <text:p>               Display validation errors.</text:p>
          </table:table-cell>
          <table:table-cell table:style-name="ce42" office:value-type="string" calcext:value-type="string">
            <text:p>NA</text:p>
          </table:table-cell>
          <table:table-cell table:style-name="ce42" office:value-type="string" calcext:value-type="string">
            <text:p>Mandatory fields should validate dynamically. If data is present, the </text:p>
            <text:p>system should not trigger the "Please Enter Value" validation message.</text:p>
          </table:table-cell>
          <table:table-cell table:style-name="ce42" office:value-type="string" calcext:value-type="string">
            <text:p>Mandatory fields continue to display "Please Enter Value" even when</text:p>
            <text:p>valid data is present.</text:p>
          </table:table-cell>
          <table:table-cell table:style-name="ce44" office:value-type="string" calcext:value-type="string">
            <text:p><text:a xlink:href="https://projects.aithent.com/plugins/tracker/?aid=189650" xlink:type="simple">#189650</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2-28" calcext:value-type="date">
            <text:p>2025-02-28</text:p>
          </table:table-cell>
          <table:table-cell table:style-name="ce41" office:value-type="string" calcext:value-type="string">
            <text:p>Neelam</text:p>
          </table:table-cell>
          <table:table-cell table:style-name="ce42" office:value-type="string" calcext:value-type="string">
            <text:p>Fixed On Both Side.</text:p>
          </table:table-cell>
          <table:table-cell table:style-name="ce69" table:number-columns-repeated="1009"/>
          <table:table-cell/>
        </table:table-row>
        <table:table-row table:style-name="ro11">
          <table:table-cell table:style-name="ce37" office:value-type="string" calcext:value-type="string">
            <text:p>TC_37</text:p>
          </table:table-cell>
          <table:table-cell table:style-name="ce41" office:value-type="string" calcext:value-type="string">
            <text:p>Plan and CDM Screen : Add New CDM </text:p>
            <text:p>                                       Service Unit Field</text:p>
          </table:table-cell>
          <table:table-cell table:style-name="ce41" office:value-type="string" calcext:value-type="string">
            <text:p>Service Unit Mandatory Field Displays "Please Enter Value" even fields contained </text:p>
            <text:p>Valid data</text:p>
          </table:table-cell>
          <table:table-cell table:style-name="ce41" office:value-type="string" calcext:value-type="string">
            <text:p>Step 1 : Navigate to the Maintenance Click on Plan and CDM.</text:p>
            <text:p>Step 2 : Access the CDM screen from both modules (Plan and CDM).</text:p>
            <text:p>Step 3 : Click on the Save button before entering any values or data in mandatory fields.</text:p>
            <text:p>Step 4 : Select the Service Type</text:p>
            <text:p>Step 5 : Click on the Service Name text field, enter a service name, and select a service record</text:p>
            <text:p>              from the Service drop-down</text:p>
            <text:p>Step 6 : Observe that the Service Unit mandatory field incorrectly displays </text:p>
            <text:p>              "Please Enter Value", even though it contains valid data.</text:p>
          </table:table-cell>
          <table:table-cell table:style-name="ce51" office:value-type="string" calcext:value-type="string">
            <text:p>Protocol Name                                         : 51-27-02-2025 Plan</text:p>
            <text:p>Service Type                                             : Dispense </text:p>
            <text:p>Service Name                                           : 51 Service 27-02-2025</text:p>
          </table:table-cell>
          <table:table-cell table:style-name="ce41" office:value-type="string" calcext:value-type="string">
            <text:p>The Service Unit mandatory field displays "Please Enter Value" incorrectly,</text:p>
            <text:p> Despite having valid data entered.</text:p>
          </table:table-cell>
          <table:table-cell table:style-name="ce41" office:value-type="string" calcext:value-type="string">
            <text:p>The system should recognize the entered values, and the mandatory </text:p>
            <text:p>Validation should only trigger for empty required fields.</text:p>
          </table:table-cell>
          <table:table-cell table:style-name="ce44" office:value-type="string" calcext:value-type="string">
            <text:p><text:a xlink:href="https://projects.aithent.com/goto?key=stdbugs&amp;val=189656&amp;group_id=181" xlink:type="simple">189656</text:a></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2-28" calcext:value-type="date">
            <text:p>2025-02-28</text:p>
          </table:table-cell>
          <table:table-cell table:style-name="ce41" office:value-type="string" calcext:value-type="string">
            <text:p>Neelam</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12">
          <table:table-cell table:style-name="ce37" office:value-type="string" calcext:value-type="string">
            <text:p>TC_38</text:p>
          </table:table-cell>
          <table:table-cell table:style-name="ce42" office:value-type="string" calcext:value-type="string">
            <text:p>Plan Screen : <text:s/>Protocol ID and Protocol Name</text:p>
          </table:table-cell>
          <table:table-cell table:style-name="ce42" office:value-type="string" calcext:value-type="string">
            <text:p>Protocol ID and Protocol Name Fields Incorrectly Show "This Field is Required and</text:p>
            <text:p>Cannot Be Empty" After Reopening Edit Plan Screen.</text:p>
          </table:table-cell>
          <table:table-cell table:style-name="ce42" office:value-type="string" calcext:value-type="string">
            <text:p>Step 1 : Navigate to the Maintenance Click on Plan.</text:p>
            <text:p>Step 2 : Search for a plan using the Search text field.</text:p>
            <text:p>Step 3 : Remove data from the Protocol ID and Protocol Name fields but do not save.</text:p>
            <text:p>Step 4 : Click on the Cancel button.</text:p>
            <text:p>Step 5 : Reopen the Edit Plan screen.</text:p>
            <text:p>Step 6 : Observe that both fields contain data but still display the validation message</text:p>
            <text:p>             "This Field is Required and Cannot Be Empty.</text:p>
          </table:table-cell>
          <table:table-cell table:style-name="ce42" office:value-type="string" calcext:value-type="string">
            <text:p>Protocol Name <text:s text:c="28"/>: 51 20-03-2025</text:p>
          </table:table-cell>
          <table:table-cell table:style-name="ce42" office:value-type="string" calcext:value-type="string">
            <text:p>If the Protocol ID and Protocol Name fields contain data, no validation</text:p>
            <text:p>Message should be displayed.</text:p>
          </table:table-cell>
          <table:table-cell table:style-name="ce42" office:value-type="string" calcext:value-type="string">
            <text:p>Even though the fields contain data, the validation message </text:p>
            <text:p>"This Field is Required and Cannot Be Empty." is incorrectly displayed.</text:p>
          </table:table-cell>
          <table:table-cell table:style-name="ce44" office:value-type="string" calcext:value-type="string">
            <text:p><text:a xlink:href="https://projects.aithent.com/goto?key=stdbugs&amp;val=189867&amp;group_id=181" xlink:type="simple">#189867</text:a></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04" calcext:value-type="date">
            <text:p>2025-03-04</text:p>
          </table:table-cell>
          <table:table-cell table:style-name="ce41" office:value-type="string" calcext:value-type="string">
            <text:p>Neelam</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2">
          <table:table-cell table:style-name="ce37" office:value-type="string" calcext:value-type="string">
            <text:p>TC_39</text:p>
          </table:table-cell>
          <table:table-cell table:style-name="ce40" office:value-type="string" calcext:value-type="string">
            <text:p>Search Bill <text:s/>: Payer Information</text:p>
          </table:table-cell>
          <table:table-cell table:style-name="ce45" office:value-type="string" calcext:value-type="string">
            <text:p>Missing Payer Information in Search Bills After Bill Generation.</text:p>
          </table:table-cell>
          <table:table-cell table:style-name="ce50" office:value-type="string" calcext:value-type="string">
            <text:p>Step 1 : Navigate to the Maintenance Click on Bill Generation Rule.</text:p>
            <text:p>Step 2 : In the Rule Name drop down, set Bill Splitting by default.</text:p>
            <text:p>Step 3 : Select only the checkbox Protocol and click the Update button.</text:p>
            <text:p>Step 4 : Use this protocol to create a bill.</text:p>
            <text:p>Step 5 : Select all bill records and generate the bill (Note: Only one bill is created as per </text:p>
            <text:p>             Rule).</text:p>
            <text:p>Step 6 : Navigate to the Billing Click on Search Bills.</text:p>
            <text:p>Step 7 : Click on Search Button.</text:p>
            <text:p><text:span text:style-name="T13">Step 8</text:span><text:span text:style-name="T16"> : Observe Payer Column in the search results.</text:span></text:p>
          </table:table-cell>
          <table:table-cell table:style-name="ce44" office:value-type="string" calcext:value-type="string">
            <text:p>Plan Name <text:s text:c="44"/>: 51 Plan Tesing UBAR 13-01-2025</text:p>
          </table:table-cell>
          <table:table-cell table:style-name="ce46" office:value-type="string" calcext:value-type="string">
            <text:p>The Payer column in the search results should display the correct payer information for the generated bill.</text:p>
          </table:table-cell>
          <table:table-cell table:style-name="ce46" office:value-type="string" calcext:value-type="string">
            <text:p>The Payer column information is missing in the search results, even though the bill is successfully created.</text:p>
          </table:table-cell>
          <table:table-cell table:style-name="ce44" office:value-type="string" calcext:value-type="string">
            <text:p><text:a xlink:href="https://projects.aithent.com/plugins/tracker/?aid=189873" xlink:type="simple">#189873</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04" calcext:value-type="date">
            <text:p>2025-03-04</text:p>
          </table:table-cell>
          <table:table-cell table:style-name="ce41" office:value-type="string" calcext:value-type="string">
            <text:p>Rajendra</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13">
          <table:table-cell table:style-name="ce37" office:value-type="string" calcext:value-type="string">
            <text:p>TC_40</text:p>
          </table:table-cell>
          <table:table-cell table:style-name="ce42" office:value-type="string" calcext:value-type="string">
            <text:p>Payer Screen : <text:s/>Payer ID <text:s/>and Account No</text:p>
          </table:table-cell>
          <table:table-cell table:style-name="ce42" office:value-type="string" calcext:value-type="string">
            <text:p>Missing Validation for Payer ID and Account No Fields – Allows Saving Empty </text:p>
            <text:p>Mandatory Fields.</text:p>
          </table:table-cell>
          <table:table-cell table:style-name="ce42" office:value-type="string" calcext:value-type="string">
            <text:p><text:span text:style-name="T7">Step 1 : Navigate to the Maintenance Click on Payer.</text:span></text:p>
            <text:p><text:span text:style-name="T7">Step 2 : Search for a payer using the search text field.</text:span></text:p>
            <text:p><text:span text:style-name="T7">Step 3 : In the Action Column, Click on edit icon.</text:span></text:p>
            <text:p><text:span text:style-name="T7">Step 4 : Remove data from the Payer ID and Account No fields, but keep the Account No </text:span></text:p>
            <text:p><text:span text:style-name="T7">             checkbox selected.</text:span></text:p>
            <text:p><text:span text:style-name="T7">Step 5 : Same as Payer Id selected: Payer Account No should be same as Payer ID pop display.</text:span></text:p>
            <text:p><text:span text:style-name="T7">             Click on ‘OK’ Button</text:span></text:p>
            <text:p><text:span text:style-name="T7">Step 6 : Observe Both fields are empty.</text:span></text:p>
            <text:p><text:span text:style-name="T7">Step 7 : Click on update button and Reopen the edit payer screen.</text:span></text:p>
            <text:p><text:span text:style-name="T7">Step 8 : Observe that : </text:span></text:p>
            <text:p><text:span text:style-name="T7">             The validation message "This field is required and cannot be empty" is not displayed.</text:span></text:p>
            <text:p><text:span text:style-name="T7">              The system allows saving the payer record even though Payer ID and Account No </text:span></text:p>
            <text:p><text:span text:style-name="T7">               Are mandatory fields.</text:span></text:p>
          </table:table-cell>
          <table:table-cell table:style-name="ce42" office:value-type="string" calcext:value-type="string">
            <text:p>Account Name <text:s text:c="37"/>: Account Name1</text:p>
          </table:table-cell>
          <table:table-cell table:style-name="ce42" office:value-type="string" calcext:value-type="string">
            <text:p>The system should display the required field validation message for </text:p>
            <text:p>Payer ID and Account No when they are empty and should not allow saving</text:p>
            <text:p>The record.</text:p>
          </table:table-cell>
          <table:table-cell table:style-name="ce42" office:value-type="string" calcext:value-type="string">
            <text:p>The system does not show validation messages and allows saving the</text:p>
            <text:p>record with empty mandatory fields.</text:p>
          </table:table-cell>
          <table:table-cell table:style-name="ce44" office:value-type="string" calcext:value-type="string">
            <text:p><text:a xlink:href="https://projects.aithent.com/goto?key=stdbugs&amp;val=189890&amp;group_id=181" xlink:type="simple">#189890</text:a></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04" calcext:value-type="date">
            <text:p>2025-03-04</text:p>
          </table:table-cell>
          <table:table-cell table:style-name="ce41" office:value-type="string" calcext:value-type="string">
            <text:p>Yash</text:p>
          </table:table-cell>
          <table:table-cell table:style-name="ce42" office:value-type="string" calcext:value-type="string">
            <text:p>Fixed On Both Side.</text:p>
          </table:table-cell>
          <table:table-cell table:style-name="ce69" table:number-columns-repeated="1009"/>
          <table:table-cell/>
        </table:table-row>
        <table:table-row table:style-name="ro3">
          <table:table-cell table:style-name="ce37" office:value-type="string" calcext:value-type="string">
            <text:p>TC_41</text:p>
          </table:table-cell>
          <table:table-cell table:style-name="ce42" office:value-type="string" calcext:value-type="string">
            <text:p>Plan Screen : Add New Payer Screen.</text:p>
          </table:table-cell>
          <table:table-cell table:style-name="ce42" office:value-type="string" calcext:value-type="string">
            <text:p>Protocol ID and Protocol Name Fields Incorrectly Show "This Field is Required and</text:p>
            <text:p>Cannot Be Empty" After Reopening Edit Plan Screen.</text:p>
          </table:table-cell>
          <table:table-cell table:style-name="ce42" office:value-type="string" calcext:value-type="string">
            <text:p>Step 1 : Navigate to the Maintenance Click on Plan </text:p>
            <text:p>Step 2 : In the Action Column, click on the Payer button.</text:p>
            <text:p>Step 3 : Click on Advance Search , Attach New Payer field and Click on Add New Payer Button.</text:p>
            <text:p>Step 4 : Click on the save button without entering any data observe that the mandatory fields</text:p>
            <text:p>             <text:span text:style-name="T7">Show the validation message "This field is required and cannot be empty."</text:span></text:p>
            <text:p><text:span text:style-name="T7">Step 5 : Click on the Cross icon to close the page.</text:span></text:p>
            <text:p><text:span text:style-name="T7">Step 6 : Click on the Add New Payer button again.</text:span></text:p>
            <text:p><text:span text:style-name="T7">Step 7 : The validation message "This field is required and cannot be empty" persists.</text:span></text:p>
            <text:p><text:span text:style-name="T7">              A new section page opens, but the validation message remains visible.</text:span></text:p>
          </table:table-cell>
          <table:table-cell table:style-name="ce42" office:value-type="string" calcext:value-type="string">
            <text:p>NA</text:p>
          </table:table-cell>
          <table:table-cell table:style-name="ce42" office:value-type="string" calcext:value-type="string">
            <text:p>The mandatory field validation message should disappear once the page is</text:p>
            <text:p>closed and reopened, and it should only appear again when trying to save </text:p>
            <text:p>Without entering data.</text:p>
          </table:table-cell>
          <table:table-cell table:style-name="ce42" office:value-type="string" calcext:value-type="string">
            <text:p>The validation message persists after closing and reopening the page,</text:p>
            <text:p>Even though the fields are still empty.</text:p>
          </table:table-cell>
          <table:table-cell table:style-name="ce44" office:value-type="string" calcext:value-type="string">
            <text:p><text:a xlink:href="https://projects.aithent.com/goto?key=stdbugs&amp;val=189904&amp;group_id=181" xlink:type="simple">#189904</text:a></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04" calcext:value-type="date">
            <text:p>2025-03-04</text:p>
          </table:table-cell>
          <table:table-cell table:style-name="ce41" office:value-type="string" calcext:value-type="string">
            <text:p>Yash</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14">
          <table:table-cell table:style-name="ce37" office:value-type="string" calcext:value-type="string">
            <text:p>TC_42</text:p>
          </table:table-cell>
          <table:table-cell table:style-name="ce42" office:value-type="string" calcext:value-type="string">
            <text:p>Payer Screen : <text:s/>Payer ID <text:s/>and Account No</text:p>
          </table:table-cell>
          <table:table-cell table:style-name="ce42" office:value-type="string" calcext:value-type="string">
            <text:p>Incorrect Validation Behavior on Payer ID and Account No Fields After Pop-up</text:p>
            <text:p>Confirmation.</text:p>
          </table:table-cell>
          <table:table-cell table:style-name="ce53" office:value-type="string" calcext:value-type="string">
            <text:p><text:span text:style-name="T7">Step 1 : Navigate to the Maintenance Click on Plan </text:span></text:p>
            <text:p><text:span text:style-name="T7">Step 2 : In the Action Column, click on the Payer button.</text:span></text:p>
            <text:p><text:span text:style-name="T7">Step 3 : Click on Advance Search , Attach New Payer field and Click on Add New Payer Button.</text:span></text:p>
            <text:p><text:span text:style-name="T7">Step 4 : Enter the same data in Payer ID and Account No, but keep the Account No checkbox </text:span></text:p>
            <text:p><text:span text:style-name="T7">             Selected.</text:span></text:p>
            <text:p><text:span text:style-name="T7">Step 5 : Do not save.</text:span></text:p>
            <text:p><text:span text:style-name="T7">Step 6 : Remove data from the Payer ID field. A pop-up appears with the message </text:span></text:p>
            <text:p><text:span text:style-name="T7">             "Payer Account No should be the same as Payer ID". Click on the OK button.</text:span></text:p>
            <text:p><text:span text:style-name="T7">Step 7 : Observe that both the Payer ID and Account No fields are empty.</text:span></text:p>
            <text:p><text:span text:style-name="T7">Step 8 : Click on the Save button.</text:span></text:p>
            <text:p><text:span text:style-name="T7">Step 9 : Observe that only the Account No field shows the validation message</text:span></text:p>
            <text:p><text:span text:style-name="T7">              "This field is required and cannot be empty", but not for the Payer ID.</text:span></text:p>
            <text:p><text:span text:style-name="T7">Step 10 : Keep the checkbox selected, then re-enter the same data in the Account No field.</text:span></text:p>
            <text:p><text:span text:style-name="T7">Step 11 : Observe that the pop-up appears again. Click on the OK button.</text:span></text:p>
            <text:p><text:span text:style-name="T7">Step 12 : Observe that both Payer ID and Account No fields are empty again, but no validation </text:span></text:p>
            <text:p><text:span text:style-name="T7">                Errors are displayed.</text:span></text:p>
            <text:p><text:span text:style-name="T7">Step 13 : Click on the Save button with both fields empty.</text:span></text:p>
          </table:table-cell>
          <table:table-cell table:style-name="ce42" office:value-type="string" calcext:value-type="string">
            <text:p>Payer ID                                                : 04-03-2025</text:p>
            <text:p>Account Name                                      : 04-03-2025</text:p>
          </table:table-cell>
          <table:table-cell table:style-name="ce42" office:value-type="string" calcext:value-type="string">
            <text:p>1. Validation messages should appear for both Payer ID and Account No</text:p>
            <text:p>      when the fields are empty.</text:p>
            <text:p>2. The system should not allow saving with mandatory fields left empty.</text:p>
          </table:table-cell>
          <table:table-cell table:style-name="ce42" office:value-type="string" calcext:value-type="string">
            <text:p>1. The validation message is missing for Payer ID after the pop-up </text:p>
            <text:p>     confirmation.</text:p>
            <text:p>2. The system allows saving with both Payer ID and Account No fields</text:p>
            <text:p>     Empty.</text:p>
          </table:table-cell>
          <table:table-cell table:style-name="ce44" office:value-type="string" calcext:value-type="string">
            <text:p><text:a xlink:href="https://projects.aithent.com/plugins/tracker/?aid=189915" xlink:type="simple">#189915</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04" calcext:value-type="date">
            <text:p>2025-03-04</text:p>
          </table:table-cell>
          <table:table-cell table:style-name="ce41" office:value-type="string" calcext:value-type="string">
            <text:p>Yash</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4">
          <table:table-cell table:style-name="ce37" office:value-type="string" calcext:value-type="string">
            <text:p>TC_43</text:p>
          </table:table-cell>
          <table:table-cell table:style-name="ce42" office:value-type="string" calcext:value-type="string">
            <text:p>Plan Screen : Delete </text:p>
          </table:table-cell>
          <table:table-cell table:style-name="ce42" office:value-type="string" calcext:value-type="string">
            <text:p>Unable to Delete Plan Due to Plan Payer Result Page Not Closing Properly.</text:p>
          </table:table-cell>
          <table:table-cell table:style-name="ce42" office:value-type="string" calcext:value-type="string">
            <text:p>Step 1 : Navigate to the Maintenance Click on Plan</text:p>
            <text:p>Step 2 : Click on the Search button and search for a plan using the Search Text field.</text:p>
            <text:p>Step 3 : In the Action column, click on the Payer button to open the Plan Payer Result page.</text:p>
            <text:p><text:span text:style-name="T7">Step 4 : In the Action column, click on the Delete button. Click on Ok Button.</text:span></text:p>
            <text:p><text:span text:style-name="T7">Step 5 : Observe that the Plan Payer Result page remains open and the delete action does not</text:span></text:p>
            <text:p><text:span text:style-name="T7">              Complete. The plan cannot be deleted.</text:span></text:p>
          </table:table-cell>
          <table:table-cell table:style-name="ce42" office:value-type="string" calcext:value-type="string">
            <text:p>Plan Name <text:s text:c="44"/>: 52 03-03-2025</text:p>
          </table:table-cell>
          <table:table-cell table:style-name="ce42" office:value-type="string" calcext:value-type="string">
            <text:p>The Plan Payer Result page should close, and only then should the system</text:p>
            <text:p>Allow the plan to be deleted.</text:p>
          </table:table-cell>
          <table:table-cell table:style-name="ce42" office:value-type="string" calcext:value-type="string">
            <text:p>The Plan Payer Result page remains open, but the system still allows </text:p>
            <text:p>The plan to be deleted.</text:p>
          </table:table-cell>
          <table:table-cell table:style-name="ce44" office:value-type="string" calcext:value-type="string">
            <text:p><text:a xlink:href="https://projects.aithent.com/goto?key=stdbugs&amp;val=190064&amp;group_id=181" xlink:type="simple">#190064</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05" calcext:value-type="date">
            <text:p>2025-03-05</text:p>
          </table:table-cell>
          <table:table-cell table:style-name="ce41" office:value-type="string" calcext:value-type="string">
            <text:p>Yash</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3">
          <table:table-cell table:style-name="ce37" office:value-type="string" calcext:value-type="string">
            <text:p>TC_44</text:p>
          </table:table-cell>
          <table:table-cell table:style-name="ce41" office:value-type="string" calcext:value-type="string">
            <text:p><text:span text:style-name="T7">Plan and CDM Screen</text:span> : Update Service Record</text:p>
          </table:table-cell>
          <table:table-cell table:style-name="ce41" office:value-type="string" calcext:value-type="string">
            <text:p><text:span text:style-name="T7">Some Fields Retain Previous Data After Removal</text:span> or Update in Service Master.</text:p>
          </table:table-cell>
          <table:table-cell table:style-name="ce41" office:value-type="string" calcext:value-type="string">
            <text:p>Step 1 : Access the Edit Service Master screen in Plan, CDM, and Service Master modules.</text:p>
            <text:p>Step 2 : Remove or update data in specific fields and save the Service Master record.</text:p>
            <text:p>Step 3 : Reopen the Service Master record.</text:p>
            <text:p>Step 4 : Observe that some fields correctly reflect the performed action (either removed or </text:p>
            <text:p>              Updated).</text:p>
            <text:p>Step 5 : However, certain fields unexpectedly retain the previous data instead of showing the</text:p>
            <text:p>             updated or removed values.</text:p>
            <text:p> </text:p>
            <text:p/>
          </table:table-cell>
          <table:table-cell table:style-name="ce51" office:value-type="string" calcext:value-type="string">
            <text:p>Plan Name                                             : 51-27-02-2025 Plan</text:p>
            <text:p>Service Name                                        : 51 Service 10</text:p>
          </table:table-cell>
          <table:table-cell table:style-name="ce41" office:value-type="string" calcext:value-type="string">
            <text:p>1. Fields should update as per the performed action.</text:p>
            <text:p>2. Removed data should not be retained upon reopening.</text:p>
            <text:p>3. Updated data should be saved and displayed correctly</text:p>
          </table:table-cell>
          <table:table-cell table:style-name="ce41" office:value-type="string" calcext:value-type="string">
            <text:p>Some fields retain the previous data even after performing an update</text:p>
            <text:p>Or removal action.</text:p>
          </table:table-cell>
          <table:table-cell table:style-name="ce44" office:value-type="string" calcext:value-type="string">
            <text:p><text:a xlink:href="https://projects.aithent.com/goto?key=stdbugs&amp;val=190068&amp;group_id=181" xlink:type="simple">#190068</text:a></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05" calcext:value-type="date">
            <text:p>2025-03-05</text:p>
          </table:table-cell>
          <table:table-cell table:style-name="ce41" office:value-type="string" calcext:value-type="string">
            <text:p>Jitender</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3">
          <table:table-cell table:style-name="ce37" office:value-type="string" calcext:value-type="string">
            <text:p>TC_45</text:p>
          </table:table-cell>
          <table:table-cell table:style-name="ce41" office:value-type="string" calcext:value-type="string">
            <text:p><text:span text:style-name="T7">Plan and CDM Screen</text:span> : Discount Per Unit (Flat)</text:p>
            <text:p>                                       Discount Per Unit (%)</text:p>
          </table:table-cell>
          <table:table-cell table:style-name="ce42" office:value-type="string" calcext:value-type="string">
            <text:p>Incorrect Retention of Discount and Flat Pricing Data after Pull Pricing Change.</text:p>
          </table:table-cell>
          <table:table-cell table:style-name="ce42" office:value-type="string" calcext:value-type="string">
            <text:p>Step 1 : Access the Add New CDM page on both the modules Plan and CDM.</text:p>
            <text:p>Step 2 : Enter the Protocol Name.</text:p>
            <text:p><text:span text:style-name="T7">Step 3 : Select a Service Type and Enter a Service Name as CB in the text field.</text:span></text:p>
            <text:p><text:span text:style-name="T7">Step 4 : Choose a service record from the drop-down.</text:span></text:p>
            <text:p><text:span text:style-name="T7">Step 5 : Observe Discount (%) and Flat both fields have a data.</text:span></text:p>
            <text:p><text:span text:style-name="T7">Step 6 : Change the Pull Pricing details from CB Pricing? Yes To No</text:span></text:p>
            <text:p><text:span text:style-name="T7">Step 7 : Still that both field contain previous data again change the Pull Pricing No To Yes</text:span></text:p>
            <text:p><text:span text:style-name="T7">Step 8 : Observe still also contain previous data so that both fields should be reset to empty </text:span></text:p>
            <text:p/>
          </table:table-cell>
          <table:table-cell table:style-name="ce20" office:value-type="string" calcext:value-type="string">
            <text:p><text:span text:style-name="T7">Plan Name                                             : 51-27-02-2025 Plan</text:span></text:p>
            <text:p><text:span text:style-name="T7">Service Type                                          : Processing-R</text:span></text:p>
            <text:p><text:span text:style-name="T7">Service Name                                        : 24CB1</text:span></text:p>
          </table:table-cell>
          <table:table-cell table:style-name="ce42" office:value-type="string" calcext:value-type="string">
            <text:p>When the Pull Pricing option is changed from "Yes" to "No" and then back</text:p>
            <text:p>to "Yes," the Discount (%) and Flat fields should be cleared </text:p>
            <text:p>(reset to empty) before new data is populated.</text:p>
          </table:table-cell>
          <table:table-cell table:style-name="ce42" office:value-type="string" calcext:value-type="string">
            <text:p>When the Pull Pricing option is changed from "Yes" to "No" and then back to "Yes," </text:p>
            <text:p>the Discount (%) and Flat fields still show the previous data instead of resetting </text:p>
            <text:p>To empty.</text:p>
          </table:table-cell>
          <table:table-cell table:style-name="ce44" office:value-type="string" calcext:value-type="string">
            <text:p><text:a xlink:href="https://projects.aithent.com/plugins/tracker/?aid=190255" xlink:type="simple">#190255</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07" calcext:value-type="date">
            <text:p>2025-03-07</text:p>
          </table:table-cell>
          <table:table-cell table:style-name="ce41" office:value-type="string" calcext:value-type="string">
            <text:p>Yash</text:p>
          </table:table-cell>
          <table:table-cell table:style-name="ce42" office:value-type="string" calcext:value-type="string">
            <text:p>52 Fixed But Open 51</text:p>
          </table:table-cell>
          <table:table-cell table:style-name="ce67" table:number-columns-repeated="12"/>
          <table:table-cell table:number-columns-repeated="998"/>
        </table:table-row>
        <table:table-row table:style-name="ro11">
          <table:table-cell table:style-name="ce37" office:value-type="string" calcext:value-type="string">
            <text:p>TC_46</text:p>
          </table:table-cell>
          <table:table-cell table:style-name="ce41" office:value-type="string" calcext:value-type="string">
            <text:p>Schedule Work list : <text:s/>Filters </text:p>
          </table:table-cell>
          <table:table-cell table:style-name="ce42" office:value-type="string" calcext:value-type="string">
            <text:p>CDM Record Missing or Checkbox Disabled After Applying Filters in Edit </text:p>
            <text:p>Worklist Screen.</text:p>
          </table:table-cell>
          <table:table-cell table:style-name="ce42" office:value-type="string" calcext:value-type="string">
            <text:p><text:span text:style-name="T7">Step 1 : Access the Edit Worklist screen with the status Scheduled WL.</text:span></text:p>
            <text:p><text:span text:style-name="T7">Step 2 : Ensure the Worklist (WL) has two attached CDM records.</text:span></text:p>
            <text:p><text:span text:style-name="T7">Step 3 : Select all filter checkboxes and click on the Service Type column filter drop-down</text:span></text:p>
            <text:p><text:span text:style-name="T7">             (filter row mark).</text:span></text:p>
            <text:p><text:span text:style-name="T7">Step 4 : Observe that one CDM record’s checkbox is automatically disabled.</text:span></text:p>
            <text:p><text:span text:style-name="T7">Step 5 : Deselect all filter checkboxes and click on the Service Type column filter drop-down </text:span></text:p>
            <text:p><text:span text:style-name="T7">              Again.</text:span></text:p>
            <text:p><text:span text:style-name="T7">Step 6 : Observe that one CDM record is missing, and only one CDM record is present.</text:span></text:p>
          </table:table-cell>
          <table:table-cell table:style-name="ce42" office:value-type="string" calcext:value-type="string">
            <text:p>Worklist Name <text:s text:c="24"/>: 10-03-2025 51 Plan Name ID</text:p>
          </table:table-cell>
          <table:table-cell table:style-name="ce42" office:value-type="string" calcext:value-type="string">
            <text:p>1. Both CDM records should remain visible regardless of filtering actions.</text:p>
            <text:p>2. No checkbox should be automatically disabled unless explicitly set by the </text:p>
            <text:p>    System logic.</text:p>
          </table:table-cell>
          <table:table-cell table:style-name="ce42" office:value-type="string" calcext:value-type="string">
            <text:p>1. One CDM record’s checkbox gets automatically disabled when applying</text:p>
            <text:p>    Filters.</text:p>
            <text:p>2. After deselecting filters and applying the Service Type filter again, one</text:p>
            <text:p>    CDM record disappears.</text:p>
          </table:table-cell>
          <table:table-cell table:style-name="ce44" office:value-type="string" calcext:value-type="string">
            <text:p><text:a xlink:href="https://projects.aithent.com/goto?key=stdbugs&amp;val=190546&amp;group_id=181" xlink:type="simple">#190546</text:a></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10" calcext:value-type="date">
            <text:p>2025-03-10</text:p>
          </table:table-cell>
          <table:table-cell table:style-name="ce41" office:value-type="string" calcext:value-type="string">
            <text:p>Sandeep</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4">
          <table:table-cell table:style-name="ce37" office:value-type="string" calcext:value-type="string">
            <text:p>TC_47</text:p>
          </table:table-cell>
          <table:table-cell table:style-name="ce42" office:value-type="string" calcext:value-type="string">
            <text:p>Review Charge : PDF Report</text:p>
          </table:table-cell>
          <table:table-cell table:style-name="ce42" office:value-type="string" calcext:value-type="string">
            <text:p>Review Charges PDF - Incorrect "Protocol ID" Column, Displays "Protocol Name" </text:p>
            <text:p>Data Instead.</text:p>
          </table:table-cell>
          <table:table-cell table:style-name="ce42" office:value-type="string" calcext:value-type="string">
            <text:p>Step 1 : Navigate to the Billing Click on Review Charges.</text:p>
            <text:p>Step 2 : Click the Search button and enter a plan in the search text field. </text:p>
            <text:p>Step 3 : Select the option to Export the PDF report.</text:p>
            <text:p>Step 4 : Open the exported PDF report.</text:p>
            <text:p>Step 5 : Look for the column labeled Protocol ID / Sponsor Protocol ID.</text:p>
            <text:p>Step 6 : Observe that the column displays Protocol Name data, not Protocol ID.</text:p>
          </table:table-cell>
          <table:table-cell table:style-name="ce42" office:value-type="string" calcext:value-type="string">
            <text:p>Plan Name <text:s text:c="44"/>: <text:s/>UBAR_Health_Care</text:p>
          </table:table-cell>
          <table:table-cell table:style-name="ce42" office:value-type="string" calcext:value-type="string">
            <text:p>The column labeled Protocol ID should display Protocol ID data, not </text:p>
            <text:p>Protocol Name.</text:p>
            <text:p/>
            <text:p/>
          </table:table-cell>
          <table:table-cell table:style-name="ce42" office:value-type="string" calcext:value-type="string">
            <text:p>The column header is labeled Protocol ID, but the data displayed is</text:p>
            <text:p>Protocol Name, which is inconsistent and incorrect.</text:p>
          </table:table-cell>
          <table:table-cell table:style-name="ce44" office:value-type="string" calcext:value-type="string">
            <text:p><text:a xlink:href="https://projects.aithent.com/plugins/tracker/?aid=190565" xlink:type="simple">#190565</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10" calcext:value-type="date">
            <text:p>2025-03-10</text:p>
          </table:table-cell>
          <table:table-cell table:style-name="ce41" office:value-type="string" calcext:value-type="string">
            <text:p>Sandeep</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9">
          <table:table-cell table:style-name="ce37" office:value-type="string" calcext:value-type="string">
            <text:p>TC_48</text:p>
          </table:table-cell>
          <table:table-cell table:style-name="ce42" office:value-type="string" calcext:value-type="string">
            <text:p>CDM Screen : Update CB</text:p>
          </table:table-cell>
          <table:table-cell table:style-name="ce42" office:value-type="string" calcext:value-type="string">
            <text:p>CB Record Retains Previous Price Eff To Date Value Before CDM Charge Creation.</text:p>
          </table:table-cell>
          <table:table-cell table:style-name="ce42" office:value-type="string" calcext:value-type="string">
            <text:p>Step 1 : Access the Edit CDM screen using Advanced Search in the Plan and CDM modules.</text:p>
            <text:p>Step 2 : Observe that the CB record contains all data before making any updates. mandatory.</text:p>
            <text:p>Step 3 : Remove data from non-mandatory fields and proceed with the update. </text:p>
            <text:p>Step 4 : Observe that the Price Eff To Date field still retains the previous value instead of </text:p>
            <text:p>              Updating to the newly entered value or remove.</text:p>
          </table:table-cell>
          <table:table-cell table:style-name="ce42" office:value-type="string" calcext:value-type="string">
            <text:p>Plan Name                                             : 51 11-03-2025</text:p>
            <text:p>CB Name                                                : 51 11-03-2025</text:p>
          </table:table-cell>
          <table:table-cell table:style-name="ce42" office:value-type="string" calcext:value-type="string">
            <text:p>The Price Eff To Date field should update correctly in the CB record when</text:p>
            <text:p>modified or removed before CDM Charge creation.</text:p>
          </table:table-cell>
          <table:table-cell table:style-name="ce42" office:value-type="string" calcext:value-type="string">
            <text:p>The Price Eff To Date field retains the previous value, even after </text:p>
            <text:p>Modification or removal.</text:p>
          </table:table-cell>
          <table:table-cell table:style-name="ce44" office:value-type="string" calcext:value-type="string">
            <text:p><text:a xlink:href="https://projects.aithent.com/plugins/tracker/?aid=190627" xlink:type="simple">#190627</text:a> </text:p>
          </table:table-cell>
          <table:table-cell table:style-name="ce44" office:value-type="string" calcext:value-type="string">
            <text:p>P-1 High</text:p>
          </table:table-cell>
          <table:table-cell table:style-name="ce41" office:value-type="string" calcext:value-type="string">
            <text:p>New</text:p>
          </table:table-cell>
          <table:table-cell table:style-name="ce44" office:value-type="string" calcext:value-type="string">
            <text:p>Prakash Sheri</text:p>
          </table:table-cell>
          <table:table-cell table:style-name="ce60" office:value-type="date" office:date-value="2025-03-11" calcext:value-type="date">
            <text:p>2025-03-11</text:p>
          </table:table-cell>
          <table:table-cell table:style-name="ce41" office:value-type="string" calcext:value-type="string">
            <text:p>Rajendra</text:p>
          </table:table-cell>
          <table:table-cell table:style-name="ce42" office:value-type="string" calcext:value-type="string">
            <text:p>Pending On Both Side.</text:p>
          </table:table-cell>
          <table:table-cell table:style-name="ce67" table:number-columns-repeated="12"/>
          <table:table-cell table:number-columns-repeated="998"/>
        </table:table-row>
        <table:table-row table:style-name="ro3">
          <table:table-cell table:style-name="ce37" office:value-type="string" calcext:value-type="string">
            <text:p>TC_49</text:p>
          </table:table-cell>
          <table:table-cell table:style-name="ce42" office:value-type="string" calcext:value-type="string">
            <text:p>Add And Edit Patient : Last , First Name</text:p>
          </table:table-cell>
          <table:table-cell table:style-name="ce42" office:value-type="string" calcext:value-type="string">
            <text:p>Inconsistent Validation for First Name and Last Name Fields in Edit Patient <text:span text:style-name="T7">and</text:span></text:p>
            <text:p><text:span text:style-name="T7">Add Patient Screen.</text:span></text:p>
          </table:table-cell>
          <table:table-cell table:style-name="ce42" office:value-type="string" calcext:value-type="string">
            <text:p>Step 1 : Access the Edit Patient screen.</text:p>
            <text:p>Step 2 : Before opening the Edit Patient screen, add a new patient record.</text:p>
            <text:p>Step 3 : In the Last Name field, enter only numeric values.</text:p>
            <text:p>Step 4 : In the First Name field, enter a combination of numbers and </text:p>
            <text:p>             Alphabets (e.g., "123John").</text:p>
            <text:p>Step 5 : Click the Save button to successfully add the patient.</text:p>
            <text:p>Step 6 : Open the Edit Patient screen for the same patient.</text:p>
            <text:p>Step 7 : Observe that the Last Name and First Name fields now only allow alphabetic </text:p>
            <text:p>             Characters, while previously, numbers were accepted.</text:p>
          </table:table-cell>
          <table:table-cell table:style-name="ce42" office:value-type="string" calcext:value-type="string">
            <text:p>First Name                               : 12288 First Name</text:p>
            <text:p>Last Name                                : 12288Last Name112</text:p>
            <text:p>Unique ID Number 1                : 901272836338</text:p>
            <text:p>            </text:p>
          </table:table-cell>
          <table:table-cell table:style-name="ce42" office:value-type="string" calcext:value-type="string">
            <text:p>1. The validation rules for First Name and Last Name should remain</text:p>
            <text:p>    consistent across both the Add Patient and Edit Patient screens.</text:p>
            <text:p>2. Either both screens should allow alphanumeric values, or both should </text:p>
            <text:p>     Restrict input to alphabets only.</text:p>
          </table:table-cell>
          <table:table-cell table:style-name="ce42" office:value-type="string" calcext:value-type="string">
            <text:p>1. The Add Patient screen allows numeric and alphanumeric input for </text:p>
            <text:p>     First Name and Last Name.</text:p>
            <text:p>2. The Edit Patient screen restricts these fields to alphabetic characters</text:p>
            <text:p>     Only, leading to inconsistency.</text:p>
          </table:table-cell>
          <table:table-cell table:style-name="ce44" office:value-type="string" calcext:value-type="string">
            <text:p><text:a xlink:href="https://projects.aithent.com/plugins/tracker/?aid=190630" xlink:type="simple">#190630</text:a> </text:p>
          </table:table-cell>
          <table:table-cell table:style-name="ce44" office:value-type="string" calcext:value-type="string">
            <text:p>P-1 High</text:p>
          </table:table-cell>
          <table:table-cell table:style-name="ce41" office:value-type="string" calcext:value-type="string">
            <text:p>New</text:p>
          </table:table-cell>
          <table:table-cell table:style-name="ce44" office:value-type="string" calcext:value-type="string">
            <text:p>Prakash Sheri</text:p>
          </table:table-cell>
          <table:table-cell table:style-name="ce60" office:value-type="date" office:date-value="2025-03-10" calcext:value-type="date">
            <text:p>2025-03-10</text:p>
          </table:table-cell>
          <table:table-cell table:style-name="ce41" office:value-type="string" calcext:value-type="string">
            <text:p>Jitender</text:p>
          </table:table-cell>
          <table:table-cell table:style-name="ce42" office:value-type="string" calcext:value-type="string">
            <text:p>Pending On Both Side.</text:p>
          </table:table-cell>
          <table:table-cell table:style-name="ce67" table:number-columns-repeated="12"/>
          <table:table-cell table:number-columns-repeated="998"/>
        </table:table-row>
        <table:table-row table:style-name="ro6">
          <table:table-cell table:style-name="ce37" office:value-type="string" calcext:value-type="string">
            <text:p>TC_50</text:p>
          </table:table-cell>
          <table:table-cell table:style-name="ce42" office:value-type="string" calcext:value-type="string">
            <text:p>Edit CB : Edit CB , Plan , CDM</text:p>
          </table:table-cell>
          <table:table-cell table:style-name="ce42" office:value-type="string" calcext:value-type="string">
            <text:p>Inconsistent Validation for Mandatory Fields in Edit CB Screen Across Plan, CDM, and </text:p>
            <text:p>CB Modules.</text:p>
          </table:table-cell>
          <table:table-cell table:style-name="ce42" office:value-type="string" calcext:value-type="string">
            <text:p>Step 1 : Access the Edit CB screen in the Plan, CDM, and CB modules.</text:p>
            <text:p>Step 2 : Observe that the CB record contains all data before making any updates mandatory</text:p>
            <text:p>             Fields.</text:p>
            <text:p>Step 3 : Remove data from all mandatory fields.</text:p>
            <text:p>Step 4 : Observe the following issues :</text:p>
            <text:p>             * Some fields correctly display "Please enter value."</text:p>
            <text:p>             * Some mandatory fields accept empty values without validation.</text:p>
            <text:p>             * The Unit Size field in the Edit CB screen does not show validation.</text:p>
            <text:p>              * The Unit Size and Service Unit fields in the Edit CB screen of Plan and CDM modules</text:p>
            <text:p>                  Are missing the "Please enter value." validation.</text:p>
          </table:table-cell>
          <table:table-cell table:style-name="ce42" office:value-type="string" calcext:value-type="string">
            <text:p>CB Name                                                : 51 11-03-2025 CB </text:p>
            <text:p>Plan Name                                             : 51 11-03-2025</text:p>
          </table:table-cell>
          <table:table-cell table:style-name="ce42" office:value-type="string" calcext:value-type="string">
            <text:p>1.  All mandatory fields should enforce validation and display </text:p>
            <text:p>   "Please enter value." when cleared.</text:p>
            <text:p>2. The Unit Size field in the Edit CB screen should have validation.</text:p>
            <text:p>3. The Unit Size and Service Unit fields in the Edit CB screen of Plan and</text:p>
            <text:p>     CDM modules should also require values.</text:p>
          </table:table-cell>
          <table:table-cell table:style-name="ce42" office:value-type="string" calcext:value-type="string">
            <text:p>1. Some mandatory fields allow empty values without validation.</text:p>
            <text:p>2. The Unit Size field in the Edit CB screen does not show validation.</text:p>
            <text:p>3. The Unit Size and Service Unit fields in the Edit CB screen of Plan and</text:p>
            <text:p>    CDM modules does not show validation.</text:p>
          </table:table-cell>
          <table:table-cell table:style-name="ce44" office:value-type="string" calcext:value-type="string">
            <text:p><text:a xlink:href="https://projects.aithent.com/plugins/tracker/?aid=190638" xlink:type="simple">#190638</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10" calcext:value-type="date">
            <text:p>2025-03-10</text:p>
          </table:table-cell>
          <table:table-cell table:style-name="ce41" office:value-type="string" calcext:value-type="string">
            <text:p>Jitender</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4">
          <table:table-cell table:style-name="ce37" office:value-type="string" calcext:value-type="string">
            <text:p>TC_51</text:p>
          </table:table-cell>
          <table:table-cell table:style-name="ce42" office:value-type="string" calcext:value-type="string">
            <text:p>Service Master : Duplicate</text:p>
          </table:table-cell>
          <table:table-cell table:style-name="ce42" office:value-type="string" calcext:value-type="string">
            <text:p>Duplicate Service Record Created in Edit Service Master Screen Instead of Restriction</text:p>
          </table:table-cell>
          <table:table-cell table:style-name="ce42" office:value-type="string" calcext:value-type="string">
            <text:p>Step 1 : Access the Edit Service Master screen in the Plan, CDM, and Service Master modules.</text:p>
            <text:p>Step 2 : Identify an existing service record.</text:p>
            <text:p>Step 3 : Update the service record by modifying it to match an already existing service record </text:p>
            <text:p>              (same asatage or identical details).</text:p>
            <text:p>Step 4 : Click the Update button.</text:p>
            <text:p>Step 5 : Observe  that a duplicate service record is created instead of being restricted.</text:p>
          </table:table-cell>
          <table:table-cell table:style-name="ce42" office:value-type="string" calcext:value-type="string">
            <text:p>Plan Name <text:s text:c="44"/>: 51 11-03-2025 51</text:p>
          </table:table-cell>
          <table:table-cell table:style-name="ce42" office:value-type="string" calcext:value-type="string">
            <text:p>The system should restrict creating duplicate service records and display a </text:p>
            <text:p>Validation message when attempting to update a record with identical details.</text:p>
          </table:table-cell>
          <table:table-cell table:style-name="ce42" office:value-type="string" calcext:value-type="string">
            <text:p>A duplicate service record is created instead of being restricted.</text:p>
          </table:table-cell>
          <table:table-cell table:style-name="ce44" office:value-type="string" calcext:value-type="string">
            <text:p><text:a xlink:href="https://projects.aithent.com/plugins/tracker/?aid=190658" xlink:type="simple">#190658</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10" calcext:value-type="date">
            <text:p>2025-03-10</text:p>
          </table:table-cell>
          <table:table-cell table:style-name="ce41" office:value-type="string" calcext:value-type="string">
            <text:p>Jitender</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11">
          <table:table-cell table:style-name="ce37" office:value-type="string" calcext:value-type="string">
            <text:p>TC_52</text:p>
          </table:table-cell>
          <table:table-cell table:style-name="ce42" office:value-type="string" calcext:value-type="string">
            <text:p>Plan Screen : Add New CDM</text:p>
          </table:table-cell>
          <table:table-cell table:style-name="ce42" office:value-type="string" calcext:value-type="string">
            <text:p>NullPointerException and "Could Not Add CDM" Error When Saving CDM Without </text:p>
            <text:p>Refreshing Page.</text:p>
          </table:table-cell>
          <table:table-cell table:style-name="ce42" office:value-type="string" calcext:value-type="string">
            <text:p>Step 1 : Access the Add New CDM Page in the Plan module.</text:p>
            <text:p>Step 2 : Add a New CDM Record and save it.</text:p>
            <text:p>Step 3 : Reopen the Add New CDM Page.</text:p>
            <text:p>Step 4 : Select only the Service Type dropdown without refreshing the page.</text:p>
            <text:p>Step 5 : Click the Save button.</text:p>
            <text:p>Step 6 : Observe the following errors :</text:p>
            <text:p>              Backend (Eclipse Logs): NullPointerException is thrown.</text:p>
            <text:p>              Frontend: "Could Not Add CDM" error appears.</text:p>
          </table:table-cell>
          <table:table-cell table:style-name="ce42" office:value-type="string" calcext:value-type="string">
            <text:p>Plan Name <text:s text:c="44"/>: 51 11-03-2025 51</text:p>
          </table:table-cell>
          <table:table-cell table:style-name="ce42" office:value-type="string" calcext:value-type="string">
            <text:p>1. The system should validate required fields before allowing the save operation.</text:p>
            <text:p>2. If required fields are missing, a proper validation message should be</text:p>
            <text:p>    displayed instead of throwing a NullPointerException.</text:p>
            <text:p>3. The system should not crash or display a generic error message.</text:p>
          </table:table-cell>
          <table:table-cell table:style-name="ce42" office:value-type="string" calcext:value-type="string">
            <text:p>1. The system throws a NullPointerException in the backend.</text:p>
            <text:p>2. A "Could Not Add CDM" error appears on the frontend.</text:p>
          </table:table-cell>
          <table:table-cell table:style-name="ce44" office:value-type="string" calcext:value-type="string">
            <text:p><text:a xlink:href="https://projects.aithent.com/plugins/tracker/?aid=190715" xlink:type="simple">#190715</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3-12" calcext:value-type="date">
            <text:p>2025-03-12</text:p>
          </table:table-cell>
          <table:table-cell table:style-name="ce41" office:value-type="string" calcext:value-type="string">
            <text:p>Rajendra</text:p>
          </table:table-cell>
          <table:table-cell table:style-name="ce42" office:value-type="string" calcext:value-type="string">
            <text:p>Fixed On Both Side.</text:p>
          </table:table-cell>
          <table:table-cell table:style-name="ce67" table:number-columns-repeated="12"/>
          <table:table-cell table:number-columns-repeated="998"/>
        </table:table-row>
        <table:table-row table:style-name="ro9">
          <table:table-cell table:style-name="ce37" office:value-type="string" calcext:value-type="string">
            <text:p>TC_53</text:p>
          </table:table-cell>
          <table:table-cell table:style-name="ce42" office:value-type="string" calcext:value-type="string">
            <text:p>Plan : Advance Search Search Service Master</text:p>
            <text:p>          Screen</text:p>
          </table:table-cell>
          <table:table-cell table:style-name="ce42" office:value-type="string" calcext:value-type="string">
            <text:p>Service Record Missing in Search Service Master Screen but Visible in CDM Module.</text:p>
          </table:table-cell>
          <table:table-cell table:style-name="ce42" office:value-type="string" calcext:value-type="string">
            <text:p>Step 1 : Access the Search Service Master Screen in the Plan Module.</text:p>
            <text:p>Step 2 : Edit the CDM that CDM is do not created charge</text:p>
            <text:p>Step 3 : Click on Advanced Search On Service Name.</text:p>
            <text:p>Step 4 : Observe that the service record is missing in the Search Service Master screen.</text:p>
            <text:p>Step 5 : Observe that the service records are correctly displayed in the CDM module.</text:p>
          </table:table-cell>
          <table:table-cell table:style-name="ce42" office:value-type="string" calcext:value-type="string">
            <text:p><text:span text:style-name="T8">Plan Name                                             : </text:span><text:span text:style-name="T19">51 Testing 11-03-2025 </text:span></text:p>
          </table:table-cell>
          <table:table-cell table:style-name="ce42" office:value-type="string" calcext:value-type="string">
            <text:p>The Search Service Master Screen under the protocol should display all </text:p>
            <text:p>Service records consistently, regardless of the module being accessed.</text:p>
          </table:table-cell>
          <table:table-cell table:style-name="ce42" office:value-type="string" calcext:value-type="string">
            <text:p>The Search Service Master Screen under the protocol in the Plan module does </text:p>
            <text:p>Not display service records, but the same records are visible in the CDM module.</text:p>
          </table:table-cell>
          <table:table-cell table:style-name="ce44" office:value-type="string" calcext:value-type="string">
            <text:p><text:a xlink:href="https://projects.aithent.com/plugins/tracker/?aid=190780" xlink:type="simple">#190780</text:a> </text:p>
          </table:table-cell>
          <table:table-cell table:style-name="ce44" office:value-type="string" calcext:value-type="string">
            <text:p>P1 High</text:p>
          </table:table-cell>
          <table:table-cell table:style-name="ce41" office:value-type="string" calcext:value-type="string">
            <text:p>New</text:p>
          </table:table-cell>
          <table:table-cell table:style-name="ce44" office:value-type="string" calcext:value-type="string">
            <text:p>Prakash Sheri</text:p>
          </table:table-cell>
          <table:table-cell table:style-name="ce60" office:value-type="date" office:date-value="2025-03-13" calcext:value-type="date">
            <text:p>2025-03-13</text:p>
          </table:table-cell>
          <table:table-cell table:style-name="ce41" office:value-type="string" calcext:value-type="string">
            <text:p>Jitender</text:p>
          </table:table-cell>
          <table:table-cell table:style-name="ce42" office:value-type="string" calcext:value-type="string">
            <text:p>Pending On Both Side.</text:p>
          </table:table-cell>
          <table:table-cell table:style-name="ce69" table:number-columns-repeated="1009"/>
          <table:table-cell/>
        </table:table-row>
        <table:table-row table:style-name="ro15">
          <table:table-cell table:style-name="ce37" office:value-type="string" calcext:value-type="string">
            <text:p>TC_54</text:p>
          </table:table-cell>
          <table:table-cell table:style-name="ce42" office:value-type="string" calcext:value-type="string">
            <text:p>CB : Label Column Name and Link Show </text:p>
            <text:p>        More</text:p>
          </table:table-cell>
          <table:table-cell table:style-name="ce42" office:value-type="string" calcext:value-type="string">
            <text:p>Show More" Action Reflects on First Row and Incorrect Column Label "CDM/CB </text:p>
            <text:p>Version Remarks" Instead of "CDM Version Remarks"</text:p>
          </table:table-cell>
          <table:table-cell table:style-name="ce42" office:value-type="string" calcext:value-type="string">
            <text:p>Step 1 : Navigate to the Maintenance Click on CDM</text:p>
            <text:p>Step 2 : Select the dropdown Billing Plan Status to "All" and the radio button </text:p>
            <text:p>             "Show CB records only". </text:p>
            <text:p>Step 3 : Click the Search button.</text:p>
            <text:p>Step 4 : In the Search Text field, search for the CB Name , and Click on the Review link in the </text:p>
            <text:p>             Versioning details column.</text:p>
            <text:p>Step 5 : Search CB History page will open.</text:p>
            <text:p>Step 6 : Observe the column labeled "CDM Version Remarks". In the same column, click on</text:p>
            <text:p>              the Show More link in the second row.</text:p>
            <text:p>Step 7 : Notice that the action triggered by the Show More link is incorrectly applied to the</text:p>
            <text:p>             First row, not the second.</text:p>
            <text:p/>
            <text:p/>
          </table:table-cell>
          <table:table-cell table:style-name="ce42" office:value-type="string" calcext:value-type="string">
            <text:p>Billing Plan Status                      : All </text:p>
            <text:p><text:span text:style-name="T7">Radio Button                              : Show CB records only</text:span></text:p>
            <text:p>CB Name                                    : 01-04-2025 52 CB</text:p>
            <text:p/>
          </table:table-cell>
          <table:table-cell table:style-name="ce42" office:value-type="string" calcext:value-type="string">
            <text:p>1. The column should display as "CDM/CB Version Remarks"</text:p>
            <text:p>(not "CDM Version Remarks").</text:p>
            <text:p/>
            <text:p>2. Clicking the Show More link in the second row should correctly apply the </text:p>
            <text:p>     Expansion action to the second row, not the first.</text:p>
          </table:table-cell>
          <table:table-cell table:style-name="ce42" office:value-type="string" calcext:value-type="string">
            <text:p>1. The column is labeled as "CDM Version Remarks" instead of "CDM/CB Version</text:p>
            <text:p>    Remarks".</text:p>
            <text:p/>
            <text:p>2. The action triggered by the Show More link in the second row is incorrectly </text:p>
            <text:p>    Applied to the first row, not the second.</text:p>
          </table:table-cell>
          <table:table-cell table:style-name="ce44" office:value-type="string" calcext:value-type="string">
            <text:p><text:a xlink:href="https://projects.aithent.com/plugins/tracker/?aid=192217" xlink:type="simple">#192217</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4-03" calcext:value-type="date">
            <text:p>2025-04-03</text:p>
          </table:table-cell>
          <table:table-cell table:style-name="ce41" office:value-type="string" calcext:value-type="string">
            <text:p>Rajendra</text:p>
          </table:table-cell>
          <table:table-cell table:style-name="ce42" office:value-type="string" calcext:value-type="string">
            <text:p>Fixed On Both Side.</text:p>
          </table:table-cell>
          <table:table-cell table:style-name="ce39" table:number-columns-repeated="1008"/>
          <table:table-cell table:number-columns-repeated="2"/>
        </table:table-row>
        <table:table-row table:style-name="ro15">
          <table:table-cell table:style-name="ce37" office:value-type="string" calcext:value-type="string">
            <text:p>TC_55</text:p>
          </table:table-cell>
          <table:table-cell table:style-name="ce42" office:value-type="string" calcext:value-type="string">
            <text:p>CB : Unit Size and Service Unit</text:p>
          </table:table-cell>
          <table:table-cell table:style-name="ce42" office:value-type="string" calcext:value-type="string">
            <text:p>Missing Validation for Mandatory Fields in CB Creation.</text:p>
          </table:table-cell>
          <table:table-cell table:style-name="ce42" office:value-type="string" calcext:value-type="string">
            <text:p>Step 1 : Navigate to the Maintenance Click on CDM</text:p>
            <text:p>Step 2 : Click on Add New CDM Button</text:p>
            <text:p>Step 3 : Select the Check Box Create a Charge Basis Record (Billing Fee Description).</text:p>
            <text:p>Step 4 : Fill in  all mandatory fields and click on Reset button.</text:p>
            <text:p>Step 5 : Click the Save button without entering data in the mandatory fields.</text:p>
            <text:p>Step 6 : Observe Unit Size and Service Unit missing Validation Message.</text:p>
          </table:table-cell>
          <table:table-cell table:style-name="ce42" office:value-type="string" calcext:value-type="string">
            <text:p>NA</text:p>
          </table:table-cell>
          <table:table-cell table:style-name="ce42" office:value-type="string" calcext:value-type="string">
            <text:p>The system should display the message "This field is required and cannot be </text:p>
            <text:p>Empty" for all mandatory fields, including Unit Size and Service Unit.</text:p>
          </table:table-cell>
          <table:table-cell table:style-name="ce42" office:value-type="string" calcext:value-type="string">
            <text:p>The system displays the correct message for some mandatory fields, but </text:p>
            <text:p>does not include Unit Size and Service Unit in the validation, even though they </text:p>
            <text:p>Are required.</text:p>
          </table:table-cell>
          <table:table-cell table:style-name="ce44" office:value-type="string" calcext:value-type="string">
            <text:p><text:a xlink:href="https://projects.aithent.com/plugins/tracker/?aid=192218" xlink:type="simple">#192218</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4-03" calcext:value-type="date">
            <text:p>2025-04-03</text:p>
          </table:table-cell>
          <table:table-cell table:style-name="ce41" office:value-type="string" calcext:value-type="string">
            <text:p>Jitender</text:p>
          </table:table-cell>
          <table:table-cell table:style-name="ce42" office:value-type="string" calcext:value-type="string">
            <text:p>Pending On Both Side.</text:p>
          </table:table-cell>
          <table:table-cell table:style-name="ce39" table:number-columns-repeated="1008"/>
          <table:table-cell table:number-columns-repeated="2"/>
        </table:table-row>
        <table:table-row table:style-name="ro15">
          <table:table-cell table:style-name="ce37" office:value-type="string" calcext:value-type="string">
            <text:p>TC_56</text:p>
          </table:table-cell>
          <table:table-cell table:style-name="ce42" office:value-type="string" calcext:value-type="string">
            <text:p>UBAR : Login Page Validation</text:p>
          </table:table-cell>
          <table:table-cell table:style-name="ce42" office:value-type="string" calcext:value-type="string">
            <text:p>Missing Validation Message and Mandatory Symbol in UBAR Login Page.</text:p>
          </table:table-cell>
          <table:table-cell table:style-name="ce42" office:value-type="string" calcext:value-type="string">
            <text:p><text:span text:style-name="T7">Step 1 : Access or Open UBAR </text:span>Login Page .</text:p>
            <text:p>Step 2 : Click on the Save button without entering any data.</text:p>
            <text:p>Step 3 : Observe that the Username field display the message :</text:p>
            <text:p>             “The field is required and can't be empty.“</text:p>
            <text:p>Step 4 : Enter the Username and password.</text:p>
            <text:p>Step 5 : Observe validation message still appears, and Mandatory symbol is missing.</text:p>
          </table:table-cell>
          <table:table-cell table:style-name="ce42" office:value-type="string" calcext:value-type="string">
            <text:p>Username   : uday </text:p>
            <text:p>Password    : Ubar789</text:p>
          </table:table-cell>
          <table:table-cell table:style-name="ce42" office:value-type="string" calcext:value-type="string">
            <text:p>1. Validation message should be disappear once a valid Username is entered.</text:p>
            <text:p>2. Required field should be display mandatory symbol.</text:p>
          </table:table-cell>
          <table:table-cell table:style-name="ce42" office:value-type="string" calcext:value-type="string">
            <text:p>1.The validation message still visible even after entering the Username and </text:p>
            <text:p>Password</text:p>
            <text:p>2. Mandatory Symbol is missing.</text:p>
          </table:table-cell>
          <table:table-cell table:style-name="ce44" office:value-type="string" calcext:value-type="string">
            <text:p><text:a xlink:href="https://projects.aithent.com/plugins/tracker/?aid=192220" xlink:type="simple">#192220</text:a> </text:p>
          </table:table-cell>
          <table:table-cell table:style-name="ce44" office:value-type="string" calcext:value-type="string">
            <text:p>P1 High</text:p>
          </table:table-cell>
          <table:table-cell table:style-name="ce41" office:value-type="string" calcext:value-type="string">
            <text:p>New</text:p>
          </table:table-cell>
          <table:table-cell table:style-name="ce44" office:value-type="string" calcext:value-type="string">
            <text:p>Prakash Sheri</text:p>
          </table:table-cell>
          <table:table-cell table:style-name="ce60" office:value-type="date" office:date-value="2025-04-03" calcext:value-type="date">
            <text:p>2025-04-03</text:p>
          </table:table-cell>
          <table:table-cell table:style-name="ce41" office:value-type="string" calcext:value-type="string">
            <text:p>Jitender</text:p>
          </table:table-cell>
          <table:table-cell table:style-name="ce42" office:value-type="string" calcext:value-type="string">
            <text:p>Pending On Both Side.</text:p>
          </table:table-cell>
          <table:table-cell table:style-name="ce39" table:number-columns-repeated="1008"/>
          <table:table-cell table:number-columns-repeated="2"/>
        </table:table-row>
        <table:table-row table:style-name="ro15">
          <table:table-cell table:style-name="ce37" office:value-type="string" calcext:value-type="string">
            <text:p>TC_57</text:p>
          </table:table-cell>
          <table:table-cell table:style-name="ce42" office:value-type="string" calcext:value-type="string">
            <text:p>Add New Worklist : Worklist Sub Type</text:p>
          </table:table-cell>
          <table:table-cell table:style-name="ce42" office:value-type="string" calcext:value-type="string">
            <text:p>Worklist Sub-Type Dropdown Data Missing on Add New Worklist Page.</text:p>
          </table:table-cell>
          <table:table-cell table:style-name="ce42" office:value-type="string" calcext:value-type="string">
            <text:p>Step 1 : Navigate to the Maintenance click on worklist scheduling.</text:p>
            <text:p>Step 2 : Click on Add New Worklist Button.</text:p>
            <text:p>Step 3 : Click on Worklist Sub-Type drop down.</text:p>
            <text:p>Step 4 : Observe that the drop down data is missing.</text:p>
          </table:table-cell>
          <table:table-cell table:style-name="ce42" office:value-type="string" calcext:value-type="string">
            <text:p>NA</text:p>
          </table:table-cell>
          <table:table-cell table:style-name="ce42" office:value-type="string" calcext:value-type="string">
            <text:p>Worklist sub type drop down should be contain required drop downs options.</text:p>
          </table:table-cell>
          <table:table-cell table:style-name="ce42" office:value-type="string" calcext:value-type="string">
            <text:p>Worklist Sub Type dropdown is empty with no data is available.</text:p>
          </table:table-cell>
          <table:table-cell table:style-name="ce44" office:value-type="string" calcext:value-type="string">
            <text:p><text:a xlink:href="https://projects.aithent.com/goto?key=stdbugs&amp;val=192221&amp;group_id=181" xlink:type="simple">#192221</text:a></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4-03" calcext:value-type="date">
            <text:p>2025-04-03</text:p>
          </table:table-cell>
          <table:table-cell table:style-name="ce41" office:value-type="string" calcext:value-type="string">
            <text:p>Jitender</text:p>
          </table:table-cell>
          <table:table-cell table:style-name="ce42" office:value-type="string" calcext:value-type="string">
            <text:p>Fixed On Both Side.</text:p>
          </table:table-cell>
          <table:table-cell table:style-name="ce39" table:number-columns-repeated="1008"/>
          <table:table-cell table:number-columns-repeated="2"/>
        </table:table-row>
        <table:table-row table:style-name="ro15">
          <table:table-cell table:style-name="ce37" office:value-type="string" calcext:value-type="string">
            <text:p>TC_58</text:p>
          </table:table-cell>
          <table:table-cell table:style-name="ce42" office:value-type="string" calcext:value-type="string">
            <text:p>Service Master : Add New and Edit Screen</text:p>
          </table:table-cell>
          <table:table-cell table:style-name="ce42" office:value-type="string" calcext:value-type="string">
            <text:p>Missing Placeholder in Add New and Edit Service Master Screen.</text:p>
          </table:table-cell>
          <table:table-cell table:style-name="ce42" office:value-type="string" calcext:value-type="string">
            <text:p>Step 1 : Access the Add New and Edit Service Master Screens.</text:p>
            <text:p>Step 2 : Observe that the placeholder text is missing in the input fields.</text:p>
          </table:table-cell>
          <table:table-cell table:style-name="ce42" office:value-type="string" calcext:value-type="string">
            <text:p>NA</text:p>
          </table:table-cell>
          <table:table-cell table:style-name="ce42" office:value-type="string" calcext:value-type="string">
            <text:p>The fields should be contain placeholder text in both Add New and Edit </text:p>
            <text:p>Service Master screen.</text:p>
          </table:table-cell>
          <table:table-cell table:style-name="ce42" office:value-type="string" calcext:value-type="string">
            <text:p>Placeholder text is missing from input fields on both screen.</text:p>
          </table:table-cell>
          <table:table-cell table:style-name="ce44" office:value-type="string" calcext:value-type="string">
            <text:p><text:a xlink:href="https://projects.aithent.com/plugins/tracker/?aid=192222" xlink:type="simple">#192222</text:a> </text:p>
          </table:table-cell>
          <table:table-cell table:style-name="ce44" office:value-type="string" calcext:value-type="string">
            <text:p>P1 High</text:p>
          </table:table-cell>
          <table:table-cell table:style-name="ce41" office:value-type="string" calcext:value-type="string">
            <text:p>New</text:p>
          </table:table-cell>
          <table:table-cell table:style-name="ce44" office:value-type="string" calcext:value-type="string">
            <text:p>Prakash Sheri</text:p>
          </table:table-cell>
          <table:table-cell table:style-name="ce60" office:value-type="date" office:date-value="2025-04-03" calcext:value-type="date">
            <text:p>2025-04-03</text:p>
          </table:table-cell>
          <table:table-cell table:style-name="ce41" office:value-type="string" calcext:value-type="string">
            <text:p>Neelam</text:p>
          </table:table-cell>
          <table:table-cell table:style-name="ce42" office:value-type="string" calcext:value-type="string">
            <text:p>Pending On Both Side.</text:p>
          </table:table-cell>
          <table:table-cell table:style-name="ce39" table:number-columns-repeated="1008"/>
          <table:table-cell table:number-columns-repeated="2"/>
        </table:table-row>
        <table:table-row table:style-name="ro4">
          <table:table-cell table:style-name="ce37" office:value-type="string" calcext:value-type="string">
            <text:p>TC_59</text:p>
          </table:table-cell>
          <table:table-cell table:style-name="ce42" office:value-type="string" calcext:value-type="string">
            <text:p>Add New Work-list : Qty and Next Page</text:p>
          </table:table-cell>
          <table:table-cell table:style-name="ce42" office:value-type="string" calcext:value-type="string">
            <text:p>Qty Column Filter Causes Hibernate Query Exception and Page Navigation Issue.</text:p>
          </table:table-cell>
          <table:table-cell table:style-name="ce42" office:value-type="string" calcext:value-type="string">
            <text:p>Step 1 : Navigate to Maintenance Click on Worklist Scheduler </text:p>
            <text:p>Step 2 : Click on Add New Work-list button.</text:p>
            <text:p>Step 3 : Fill in the mandatory fields and Enter a Protocol that contains more than </text:p>
            <text:p>             4 CDM records.</text:p>
            <text:p>Step 4 : Click on the Qty column filter. </text:p>
            <text:p>Step 5 : Pagination (Next/Previous buttons) is disabled, preventing navigation to the next page.</text:p>
          </table:table-cell>
          <table:table-cell table:style-name="ce42" office:value-type="string" calcext:value-type="string">
            <text:p>Protocol                              : 03-4-2025 52 (03-4-2025 52)</text:p>
            <text:p/>
          </table:table-cell>
          <table:table-cell table:style-name="ce42" office:value-type="string" calcext:value-type="string">
            <text:p>1. The Qty column filter should work without errors.</text:p>
            <text:p>2. All CDM records should be displayed.</text:p>
            <text:p>3. If there are more than 4 records, pagination should allow navigation to</text:p>
            <text:p>    The next page.</text:p>
          </table:table-cell>
          <table:table-cell table:style-name="ce42" office:value-type="string" calcext:value-type="string">
            <text:p><text:span text:style-name="T7">1. Qty column filter causes a Hibernate Query Exception in Eclipse.</text:span></text:p>
            <text:p><text:span text:style-name="T7">2. The frontend throws an error message.</text:span></text:p>
            <text:p><text:span text:style-name="T7">3. Only 4 CDM records are displayed, and next page does not work, </text:span></text:p>
            <text:p><text:span text:style-name="T7">    Restricting access to additional records.</text:span></text:p>
          </table:table-cell>
          <table:table-cell table:style-name="ce44" office:value-type="string" calcext:value-type="string">
            <text:p><text:a xlink:href="https://projects.aithent.com/plugins/tracker/?aid=192318" xlink:type="simple">#192318</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4-04" calcext:value-type="date">
            <text:p>2025-04-04</text:p>
          </table:table-cell>
          <table:table-cell table:style-name="ce41" office:value-type="string" calcext:value-type="string">
            <text:p>Rajendra</text:p>
          </table:table-cell>
          <table:table-cell table:style-name="ce42" office:value-type="string" calcext:value-type="string">
            <text:p>Fixed On Both Side.</text:p>
          </table:table-cell>
          <table:table-cell table:style-name="ce39" table:number-columns-repeated="1008"/>
          <table:table-cell table:number-columns-repeated="2"/>
        </table:table-row>
        <table:table-row table:style-name="ro7">
          <table:table-cell table:style-name="ce37" office:value-type="string" calcext:value-type="string">
            <text:p>TC_60</text:p>
          </table:table-cell>
          <table:table-cell table:style-name="ce42" office:value-type="string" calcext:value-type="string">
            <text:p>Add New Work-list : Save Button</text:p>
          </table:table-cell>
          <table:table-cell table:style-name="ce42" office:value-type="string" calcext:value-type="string">
            <text:p>Save Button Gets Disabled Permanently Without Entering Mandatory Fields in </text:p>
            <text:p>Worklist Scheduling.</text:p>
          </table:table-cell>
          <table:table-cell table:style-name="ce42" office:value-type="string" calcext:value-type="string">
            <text:p>Step 1 : Navigate to Maintenance Click on Work list Scheduling  </text:p>
            <text:p>Step 2 : Click on Add New Work-lit Button.</text:p>
            <text:p>Step 3 : Without entering any fields, click the "Save" button.</text:p>
          </table:table-cell>
          <table:table-cell table:style-name="ce42" office:value-type="string" calcext:value-type="string">
            <text:p>NA</text:p>
          </table:table-cell>
          <table:table-cell table:style-name="ce42" office:value-type="string" calcext:value-type="string">
            <text:p>The system should display validation messages for required fields and keep the</text:p>
            <text:p>Save button active to allow retry after filling fields.</text:p>
          </table:table-cell>
          <table:table-cell table:style-name="ce42" office:value-type="string" calcext:value-type="string">
            <text:p>The Save button becomes disabled immediately after clicking without entering data.</text:p>
            <text:p/>
            <text:p>The user is not allowed to save again, even after entering the mandatory fields.</text:p>
          </table:table-cell>
          <table:table-cell table:style-name="ce44" office:value-type="string" calcext:value-type="string">
            <text:p><text:a xlink:href="https://projects.aithent.com/plugins/tracker/?aid=192515" xlink:type="simple">#192515</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4-07" calcext:value-type="date">
            <text:p>2025-04-07</text:p>
          </table:table-cell>
          <table:table-cell table:style-name="ce41" office:value-type="string" calcext:value-type="string">
            <text:p>Rajendra</text:p>
          </table:table-cell>
          <table:table-cell table:style-name="ce42" office:value-type="string" calcext:value-type="string">
            <text:p>Fixed On Both Side.</text:p>
          </table:table-cell>
          <table:table-cell table:style-name="ce39" table:number-columns-repeated="1008"/>
          <table:table-cell table:number-columns-repeated="2"/>
        </table:table-row>
        <table:table-row table:style-name="ro4">
          <table:table-cell table:style-name="ce37" office:value-type="string" calcext:value-type="string">
            <text:p>TC_61</text:p>
          </table:table-cell>
          <table:table-cell table:style-name="ce42" office:value-type="string" calcext:value-type="string">
            <text:p>CB : Price Version</text:p>
          </table:table-cell>
          <table:table-cell table:style-name="ce42" office:value-type="string" calcext:value-type="string">
            <text:p>Updated CB Price Not Reflected in Plan and CDM Screens After Version Creation.</text:p>
          </table:table-cell>
          <table:table-cell table:style-name="ce42" office:value-type="string" calcext:value-type="string">
            <text:p>Step 1 : Navigate to the Maintenance Click on CDM </text:p>
            <text:p>Step 2 : Select Billing Status dropdown as "All".</text:p>
            <text:p>Step 3 : Select the radio button: "Show CB records only".</text:p>
            <text:p>Step 4 : Click the Search button and search for the required CB Name.</text:p>
            <text:p>Step 5 : Update the CB Price (Note: This CB is attached to a Plan that has already generated a Bill).</text:p>
            <text:p>Step 6 : Observe the behavior after update.</text:p>
          </table:table-cell>
          <table:table-cell table:style-name="ce42" office:value-type="string" calcext:value-type="string">
            <text:p>CB Name <text:s text:c="29"/>: 07-04-2025</text:p>
          </table:table-cell>
          <table:table-cell table:style-name="ce42" office:value-type="string" calcext:value-type="string">
            <text:p>1. A new version should be created with the updated price.</text:p>
            <text:p/>
            <text:p>2. The updated price should be visible across CB, Plan, and CDM screens.</text:p>
          </table:table-cell>
          <table:table-cell table:style-name="ce42" office:value-type="string" calcext:value-type="string">
            <text:p>1. A new version is created.</text:p>
            <text:p>2. The updated price is visible only in the CB screen.</text:p>
            <text:p>3. The Plan and CDM screens still show the old price, missing the updated value.</text:p>
          </table:table-cell>
          <table:table-cell table:style-name="ce44" office:value-type="string" calcext:value-type="string">
            <text:p><text:a xlink:href="https://projects.aithent.com/plugins/tracker/?aid=192634" xlink:type="simple">#192634</text:a> </text:p>
          </table:table-cell>
          <table:table-cell table:style-name="ce44" office:value-type="string" calcext:value-type="string">
            <text:p>P1 High</text:p>
          </table:table-cell>
          <table:table-cell table:style-name="ce41" office:value-type="string" calcext:value-type="string">
            <text:p>New</text:p>
          </table:table-cell>
          <table:table-cell table:style-name="ce44" office:value-type="string" calcext:value-type="string">
            <text:p>Prakash Sheri</text:p>
          </table:table-cell>
          <table:table-cell table:style-name="ce60" office:value-type="date" office:date-value="2025-04-09" calcext:value-type="date">
            <text:p>2025-04-09</text:p>
          </table:table-cell>
          <table:table-cell table:style-name="ce41" office:value-type="string" calcext:value-type="string">
            <text:p>Rajendra</text:p>
          </table:table-cell>
          <table:table-cell table:style-name="ce42" office:value-type="string" calcext:value-type="string">
            <text:p>Pending On Both Side.</text:p>
          </table:table-cell>
          <table:table-cell table:style-name="ce39" table:number-columns-repeated="1008"/>
          <table:table-cell table:number-columns-repeated="2"/>
        </table:table-row>
        <table:table-row table:style-name="ro5">
          <table:table-cell table:style-name="ce37" office:value-type="string" calcext:value-type="string">
            <text:p>TC_62</text:p>
          </table:table-cell>
          <table:table-cell table:style-name="ce42" office:value-type="string" calcext:value-type="string">
            <text:p>Add New Work-list : Step Navigation</text:p>
          </table:table-cell>
          <table:table-cell table:style-name="ce42" office:value-type="string" calcext:value-type="string">
            <text:p><text:span text:style-name="T8">Only First 4 CDM Records Displayed for Protocol, Step Navigation</text:span><text:span text:style-name="T9"> Missing for </text:span></text:p>
            <text:p><text:span text:style-name="T9">Additional Records.</text:span></text:p>
          </table:table-cell>
          <table:table-cell table:style-name="ce42" office:value-type="string" calcext:value-type="string">
            <text:p>Step 1 : Navigate to Add New Worklist page.</text:p>
            <text:p>Step 2 : Enter all mandatory fields and select a protocol that contains more than</text:p>
            <text:p>              5 or 6 CDM records.</text:p>
            <text:p>Step 3 : Observe the list of records populated on the screen.</text:p>
          </table:table-cell>
          <table:table-cell table:style-name="ce42" office:value-type="string" calcext:value-type="string">
            <text:p>Protocol Name <text:s text:c="19"/>: 07-04-2025 52 (07-04-2025 52)</text:p>
          </table:table-cell>
          <table:table-cell table:style-name="ce42" office:value-type="string" calcext:value-type="string">
            <text:p>All CDM records linked to the selected protocol should be displayed in the </text:p>
            <text:p>Add New Worklist screen, with pagination or scroll enabled if records exceed the</text:p>
            <text:p>Visible limit (e.g., more than 4).</text:p>
          </table:table-cell>
          <table:table-cell table:style-name="ce42" office:value-type="string" calcext:value-type="string">
            <text:p><text:span text:style-name="T9">Only the first 4 CDM records are displayed. Remaining records are not visible, and </text:span></text:p>
            <text:p><text:span text:style-name="T7">Step navigation</text:span><text:span text:style-name="T9"> or scrolling is missing, preventing access to additional records.</text:span></text:p>
          </table:table-cell>
          <table:table-cell table:style-name="ce44" office:value-type="string" calcext:value-type="string">
            <text:p><text:a xlink:href="https://projects.aithent.com/plugins/tracker/?aid=192636" xlink:type="simple">#192636</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4-09" calcext:value-type="date">
            <text:p>2025-04-09</text:p>
          </table:table-cell>
          <table:table-cell table:style-name="ce41" office:value-type="string" calcext:value-type="string">
            <text:p>Rajendra</text:p>
          </table:table-cell>
          <table:table-cell table:style-name="ce42" office:value-type="string" calcext:value-type="string">
            <text:p>Fixed On Both Side.</text:p>
          </table:table-cell>
          <table:table-cell table:style-name="ce39" table:number-columns-repeated="1008"/>
          <table:table-cell table:number-columns-repeated="2"/>
        </table:table-row>
        <table:table-row table:style-name="ro3">
          <table:table-cell table:style-name="ce37" office:value-type="string" calcext:value-type="string">
            <text:p>TC_63</text:p>
          </table:table-cell>
          <table:table-cell table:style-name="ce42" office:value-type="string" calcext:value-type="string">
            <text:p>Work list Search Result : Update Work list Status</text:p>
          </table:table-cell>
          <table:table-cell table:style-name="ce42" office:value-type="string" calcext:value-type="string">
            <text:p>Resource Failure And Hibernate Resource Closed Exception through When Updating </text:p>
            <text:p>The Work-list Status and Multi Select Check Boxes Misbehave.</text:p>
          </table:table-cell>
          <table:table-cell table:style-name="ce42" office:value-type="string" calcext:value-type="string">
            <text:p>Step 1 : Navigate to Maintenance Click On Worklist Scheduler</text:p>
            <text:p>Step 2 : In the filters select Billing Status and Radio Button as Active.</text:p>
            <text:p>Step 3 : Click the Search button and then select all checkboxes in the result list.</text:p>
            <text:p>Step 4 : Click on the Change Status button and from the "Select new Worklist Status" dropdown,</text:p>
            <text:p>             change the status :</text:p>
            <text:p>             Either from Active to Inactive, or From Active to Active (no actual status change).</text:p>
            <text:p>Step 5 : Click on Save Button.</text:p>
            <text:p><text:span text:style-name="T7">Step 6 : Observe the front-end behavior and check the logs in Eclipse and </text:span></text:p>
            <text:p><text:span text:style-name="T7">             Checkbox selection behavior</text:span></text:p>
          </table:table-cell>
          <table:table-cell table:style-name="ce42" office:value-type="string" calcext:value-type="string">
            <text:p>NA</text:p>
          </table:table-cell>
          <table:table-cell table:style-name="ce42" office:value-type="string" calcext:value-type="string">
            <text:p>1. The system should gracefully update the status of selected worklist items.</text:p>
            <text:p>2. If there is no actual status change (e.g., Active to Active), the system should still</text:p>
            <text:p>Handle the request without throwing an error.</text:p>
            <text:p>3. No Hibernate exceptions or resource failures should occur.</text:p>
            <text:p>4. Selection and deselection logic should follow standard multi-select behavior.</text:p>
          </table:table-cell>
          <table:table-cell table:style-name="ce42" office:value-type="string" calcext:value-type="string">
            <text:p>1. UI throws an exception after clicking Save.</text:p>
            <text:p><text:span text:style-name="T7">2. Backend logs (Eclipse) show  Hibernate Resource Closed Exception</text:span>.</text:p>
            <text:p>3. No status change is applied, and system fails to handle the update request.</text:p>
            <text:p>4. The checkboxes do not behave like standard multi-select logic </text:p>
            <text:p>    (no indeterminate state, Unexpected auto-deselects).</text:p>
          </table:table-cell>
          <table:table-cell table:style-name="ce44" office:value-type="string" calcext:value-type="string">
            <text:p><text:a xlink:href="https://projects.aithent.com/goto?key=stdbugs&amp;val=192698&amp;group_id=181" xlink:type="simple">#192698</text:a></text:p>
          </table:table-cell>
          <table:table-cell table:style-name="ce44" office:value-type="string" calcext:value-type="string">
            <text:p>P1 High</text:p>
          </table:table-cell>
          <table:table-cell table:style-name="ce41" office:value-type="string" calcext:value-type="string">
            <text:p>New</text:p>
          </table:table-cell>
          <table:table-cell table:style-name="ce44" office:value-type="string" calcext:value-type="string">
            <text:p>Prakash Sheri</text:p>
          </table:table-cell>
          <table:table-cell table:style-name="ce60" office:value-type="date" office:date-value="2025-04-10" calcext:value-type="date">
            <text:p>2025-04-10</text:p>
          </table:table-cell>
          <table:table-cell table:style-name="ce41" office:value-type="string" calcext:value-type="string">
            <text:p>Jitender</text:p>
          </table:table-cell>
          <table:table-cell table:style-name="ce42" office:value-type="string" calcext:value-type="string">
            <text:p>Pending On Both Side.</text:p>
          </table:table-cell>
          <table:table-cell table:style-name="ce39" table:number-columns-repeated="1008"/>
          <table:table-cell table:number-columns-repeated="2"/>
        </table:table-row>
        <table:table-row table:style-name="ro9">
          <table:table-cell table:style-name="ce37" office:value-type="string" calcext:value-type="string">
            <text:p>TC_64</text:p>
          </table:table-cell>
          <table:table-cell table:style-name="ce42" office:value-type="string" calcext:value-type="string">
            <text:p>Payer Account Ledger : Search Button</text:p>
          </table:table-cell>
          <table:table-cell table:style-name="ce42" office:value-type="string" calcext:value-type="string">
            <text:p>Hibernate Query Exception and Unable To Process Error Message Get When </text:p>
            <text:p>Search the Payer Account Ledger.</text:p>
          </table:table-cell>
          <table:table-cell table:style-name="ce42" office:value-type="string" calcext:value-type="string">
            <text:p>Step 1 : Navigate to Report Click on Payer Account Ledger.</text:p>
            <text:p>Step 2 : Click on Search Button.</text:p>
            <text:p>Step 3 : Observe the frontend and backend behavior:</text:p>
            <text:p>              Frontend : Displays an error message, “Unable to Process.”</text:p>
            <text:p>              Backend (Eclipse): Throws a Hibernate Query Exception.</text:p>
          </table:table-cell>
          <table:table-cell table:style-name="ce42" office:value-type="string" calcext:value-type="string">
            <text:p>NA</text:p>
          </table:table-cell>
          <table:table-cell table:style-name="ce42" office:value-type="string" calcext:value-type="string">
            <text:p>The Payer Account Ledger Search Result page should load without errors or </text:p>
            <text:p>exceptions, displaying the search results as intended.</text:p>
          </table:table-cell>
          <table:table-cell table:style-name="ce42" office:value-type="string" calcext:value-type="string">
            <text:p>Front-End through error unable to process and eclipse hibernate query exception.</text:p>
          </table:table-cell>
          <table:table-cell table:style-name="ce44" office:value-type="string" calcext:value-type="string">
            <text:p><text:a xlink:href="https://projects.aithent.com/plugins/tracker/?aid=192795" xlink:type="simple">#192795</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4-11" calcext:value-type="date">
            <text:p>2025-04-11</text:p>
          </table:table-cell>
          <table:table-cell table:style-name="ce41" office:value-type="string" calcext:value-type="string">
            <text:p>Yash</text:p>
          </table:table-cell>
          <table:table-cell table:style-name="ce42" office:value-type="string" calcext:value-type="string">
            <text:p>Fixed On Both Side.</text:p>
          </table:table-cell>
          <table:table-cell table:style-name="ce39" table:number-columns-repeated="1008"/>
          <table:table-cell table:number-columns-repeated="2"/>
        </table:table-row>
        <table:table-row table:style-name="ro11">
          <table:table-cell table:style-name="ce37" office:value-type="string" calcext:value-type="string">
            <text:p>TC_65</text:p>
          </table:table-cell>
          <table:table-cell table:style-name="ce42" office:value-type="string" calcext:value-type="string">
            <text:p>Add New CDM : Plan and <text:s/>CDM Screen</text:p>
          </table:table-cell>
          <table:table-cell table:style-name="ce42" office:value-type="string" calcext:value-type="string">
            <text:p>Validation Errors Not Cleared, and Tax Fields Editable After Selecting CB Name as </text:p>
            <text:p>Service Name.</text:p>
          </table:table-cell>
          <table:table-cell table:style-name="ce42" office:value-type="string" calcext:value-type="string">
            <text:p>Step 1 : Access the Add New CDM Screen from both Plan and CDM modules.</text:p>
            <text:p>Step 2 : Enter the Protocol value.</text:p>
            <text:p>Step 3 : Click on the Save button without filling any mandatory fields.</text:p>
            <text:p>Step 4 : Observe that all required fields show error messages like "Please enter value".</text:p>
            <text:p>Step 5 : Select a Service Type.</text:p>
            <text:p>Step 6 : Click on the Service Name text field, and Enter Service Name a Use this CB name as </text:p>
            <text:p>             Service Name?.</text:p>
            <text:p>Step 7 : Observe the behavior of the form after this action.</text:p>
          </table:table-cell>
          <table:table-cell table:style-name="ce42" office:value-type="string" calcext:value-type="string">
            <text:p>Service Type                                            : Supply       </text:p>
            <text:p><text:span text:style-name="T7">Use this CB name as Service name?       : 08-04-2025 52 CB Yes</text:span></text:p>
          </table:table-cell>
          <table:table-cell table:style-name="ce42" office:value-type="string" calcext:value-type="string">
            <text:p>After using Use this CB name as Service name ?</text:p>
            <text:p>1. All related fields under Service Information and Pricing Information should be </text:p>
            <text:p>    automatically populated with CB data.</text:p>
            <text:p>2. Error messages should be removed for the fields that now contain values.</text:p>
            <text:p>3. Tax Type and Tax (%) fields should be disabled (non-editable) since the values </text:p>
            <text:p>    Are controlled by the CB record.</text:p>
          </table:table-cell>
          <table:table-cell table:style-name="ce42" office:value-type="string" calcext:value-type="string">
            <text:p><text:span text:style-name="T7">1. Validation error messages (e.g., “Please enter value”) are not cleared, even for </text:span></text:p>
            <text:p><text:span text:style-name="T7">    The fields that now have values.</text:span></text:p>
            <text:p><text:span text:style-name="T7">2. Tax Type and Tax (%) fields remain editable or visible, though they should be </text:span></text:p>
            <text:p><text:span text:style-name="T7">    Locked when data is pulled from the CB record.</text:span></text:p>
          </table:table-cell>
          <table:table-cell table:style-name="ce44" office:value-type="string" calcext:value-type="string">
            <text:p><text:a xlink:href="https://projects.aithent.com/goto?key=stdbugs&amp;val=192796&amp;group_id=181" xlink:type="simple">#192796</text:a></text:p>
          </table:table-cell>
          <table:table-cell table:style-name="ce44" office:value-type="string" calcext:value-type="string">
            <text:p>P1 High</text:p>
          </table:table-cell>
          <table:table-cell table:style-name="ce41" office:value-type="string" calcext:value-type="string">
            <text:p>New</text:p>
          </table:table-cell>
          <table:table-cell table:style-name="ce44" office:value-type="string" calcext:value-type="string">
            <text:p>Prakash Sheri</text:p>
          </table:table-cell>
          <table:table-cell table:style-name="ce60" office:value-type="date" office:date-value="2025-04-11" calcext:value-type="date">
            <text:p>2025-04-11</text:p>
          </table:table-cell>
          <table:table-cell table:style-name="ce41" office:value-type="string" calcext:value-type="string">
            <text:p>Yash</text:p>
          </table:table-cell>
          <table:table-cell table:style-name="ce42" office:value-type="string" calcext:value-type="string">
            <text:p>Pending On Both Side.</text:p>
          </table:table-cell>
          <table:table-cell table:style-name="ce39" table:number-columns-repeated="1008"/>
          <table:table-cell table:number-columns-repeated="2"/>
        </table:table-row>
        <table:table-row table:style-name="ro12">
          <table:table-cell table:style-name="ce37" office:value-type="string" calcext:value-type="string">
            <text:p>TC_66</text:p>
          </table:table-cell>
          <table:table-cell table:style-name="ce42" office:value-type="string" calcext:value-type="string">
            <text:p>Work-list : Date Fields Validation</text:p>
          </table:table-cell>
          <table:table-cell table:style-name="ce42" office:value-type="string" calcext:value-type="string">
            <text:p>Date fields Validation issue in Add New Work-list.</text:p>
          </table:table-cell>
          <table:table-cell table:style-name="ce42" office:value-type="string" calcext:value-type="string">
            <text:p>Step 1 : Access or Open Schedule Status Work-list.</text:p>
            <text:p>Step 2 : Update Work-list Valid From Date Update the Worklist Execution Start Date after </text:p>
            <text:p>             the WL From Date</text:p>
            <text:p>Step 3 : Observe Both fields Dates are incorrect.</text:p>
            <text:p/>
          </table:table-cell>
          <table:table-cell table:style-name="ce42" office:value-type="string" calcext:value-type="string">
            <text:p>NA</text:p>
          </table:table-cell>
          <table:table-cell table:style-name="ce42" office:value-type="string" calcext:value-type="string">
            <text:p>Work-list should be accept the date like</text:p>
            <text:p>1. WL Execution Start Date should be in between the WL Valid From Date and</text:p>
            <text:p>    WL Valid To Date. </text:p>
            <text:p>2. WL Valid From Date date should be Accept before the WL Execution Start Date </text:p>
            <text:p>     And under the WL Valid To Date.</text:p>
            <text:p>3. WL Valid To Date should be accept equal to or greate then WL Valid From Date</text:p>
            <text:p>    </text:p>
          </table:table-cell>
          <table:table-cell table:style-name="ce42" office:value-type="string" calcext:value-type="string">
            <text:p>1. It accepts a "Valid From Date" that is after the "Execution Start Date".</text:p>
            <text:p>2. It does not check if the "Execution Start Date" is between the "Valid From Date" </text:p>
            <text:p>    And "Valid To Date".</text:p>
            <text:p>3. No error message is shown for these wrong dates.</text:p>
          </table:table-cell>
          <table:table-cell table:style-name="ce44" office:value-type="string" calcext:value-type="string">
            <text:p><text:a xlink:href="https://projects.aithent.com/plugins/tracker/?aid=193081" xlink:type="simple">#193081</text:a> </text:p>
          </table:table-cell>
          <table:table-cell table:style-name="ce44" office:value-type="string" calcext:value-type="string">
            <text:p>P1 High</text:p>
          </table:table-cell>
          <table:table-cell table:style-name="ce41" office:value-type="string" calcext:value-type="string">
            <text:p>New</text:p>
          </table:table-cell>
          <table:table-cell table:style-name="ce44" office:value-type="string" calcext:value-type="string">
            <text:p>Prakash Sheri</text:p>
          </table:table-cell>
          <table:table-cell table:style-name="ce60" office:value-type="date" office:date-value="2025-04-16" calcext:value-type="date">
            <text:p>2025-04-16</text:p>
          </table:table-cell>
          <table:table-cell table:style-name="ce41" office:value-type="string" calcext:value-type="string">
            <text:p>Sandeep</text:p>
          </table:table-cell>
          <table:table-cell table:style-name="ce42" office:value-type="string" calcext:value-type="string">
            <text:p>Pending On Both Side.</text:p>
          </table:table-cell>
          <table:table-cell table:style-name="ce39" table:number-columns-repeated="1008"/>
          <table:table-cell table:number-columns-repeated="2"/>
        </table:table-row>
        <table:table-row table:style-name="ro3">
          <table:table-cell table:style-name="ce37" office:value-type="string" calcext:value-type="string">
            <text:p>TC_67</text:p>
          </table:table-cell>
          <table:table-cell table:style-name="ce42" office:value-type="string" calcext:value-type="string">
            <text:p>Work list : Add And Edit Screen.</text:p>
          </table:table-cell>
          <table:table-cell table:style-name="ce42" office:value-type="string" calcext:value-type="string">
            <text:p>Valid Fields Still Trigger 'Please Enter Values' Error on Work-list Add and Edit Screen.</text:p>
          </table:table-cell>
          <table:table-cell table:style-name="ce41" office:value-type="string" calcext:value-type="string">
            <text:p>Step 1 : Navigate to the Maintenance Click on Work-list Scheduling </text:p>
            <text:p>Step 2 : In the Search Tex field , Search for the Work list Name</text:p>
            <text:p><text:span text:style-name="T7">Step 3 : Click on Add and Edit icon in the Action Column </text:span></text:p>
            <text:p>Step 4 : Remove all mandatory fields and Fill them One by One with valid  data</text:p>
            <text:p>Step 5 : Use the calender icon to select a valid date for Work-list Execution Start Date*</text:p>
            <text:p>Step 6 : Use Advance Search to select the Protocol and Payer fields. </text:p>
            <text:p><text:span text:style-name="T7">Step 7 : Observe the even through the Work list Execution Start Date , Protocol , and Payer</text:span></text:p>
            <text:p><text:span text:style-name="T7">              fields the system still displays the message "please enter values" and does not allow </text:span></text:p>
            <text:p><text:span text:style-name="T7">              Saving.</text:span></text:p>
          </table:table-cell>
          <table:table-cell table:style-name="ce41" office:value-type="string" calcext:value-type="string">
            <text:p>WL Name <text:s text:c="46"/>: 19-02-2025-WL1771</text:p>
          </table:table-cell>
          <table:table-cell table:style-name="ce41" office:value-type="string" calcext:value-type="string">
            <text:p>If these fields (Work-list Execution Start Date, Protocol, Payer) have a data</text:p>
            <text:p>Then it should not display please enter value.</text:p>
          </table:table-cell>
          <table:table-cell table:style-name="ce41" office:value-type="string" calcext:value-type="string">
            <text:p>Even though the Work-list Execution Start Date, Protocol, and Payer fields contain</text:p>
            <text:p>valid data, the system still displays the error message "please enter values" and </text:p>
            <text:p>does not allow the user to proceed.</text:p>
          </table:table-cell>
          <table:table-cell table:style-name="ce44" office:value-type="string" calcext:value-type="string">
            <text:p><text:a xlink:href="https://projects.aithent.com/plugins/tracker/?aid=193089" xlink:type="simple">#193089</text:a> </text:p>
          </table:table-cell>
          <table:table-cell table:style-name="ce44" office:value-type="string" calcext:value-type="string">
            <text:p>P1 High</text:p>
          </table:table-cell>
          <table:table-cell table:style-name="ce41" office:value-type="string" calcext:value-type="string">
            <text:p>Closed</text:p>
          </table:table-cell>
          <table:table-cell table:style-name="ce44" office:value-type="string" calcext:value-type="string">
            <text:p>Prakash Sheri</text:p>
          </table:table-cell>
          <table:table-cell table:style-name="ce60" office:value-type="date" office:date-value="2025-04-16" calcext:value-type="date">
            <text:p>2025-04-16</text:p>
          </table:table-cell>
          <table:table-cell table:style-name="ce41" office:value-type="string" calcext:value-type="string">
            <text:p>Neelam</text:p>
          </table:table-cell>
          <table:table-cell table:style-name="ce42" office:value-type="string" calcext:value-type="string">
            <text:p>52 Fixed But Open 51</text:p>
          </table:table-cell>
          <table:table-cell table:style-name="ce39" table:number-columns-repeated="1008"/>
          <table:table-cell table:number-columns-repeated="2"/>
        </table:table-row>
        <table:table-row table:style-name="ro15">
          <table:table-cell table:style-name="ce37"/>
          <table:table-cell table:style-name="ce43" table:number-columns-repeated="6"/>
          <table:table-cell table:style-name="ce56"/>
          <table:table-cell table:style-name="ce43" table:number-columns-repeated="6"/>
          <table:table-cell table:style-name="ce39" table:number-columns-repeated="1008"/>
          <table:table-cell table:number-columns-repeated="2"/>
        </table:table-row>
        <table:table-row table:style-name="ro16">
          <table:table-cell table:style-name="ce37"/>
          <table:table-cell table:style-name="ce40"/>
          <table:table-cell table:style-name="ce47" office:value-type="string" calcext:value-type="string">
            <text:p>From 01-January-2025 to 22-April-2025 [67 bugs logged in Tuleap Application]</text:p>
          </table:table-cell>
          <table:table-cell table:style-name="ce41"/>
          <table:table-cell table:style-name="ce44"/>
          <table:table-cell table:style-name="ce46" table:number-columns-repeated="2"/>
          <table:table-cell table:style-name="ce44"/>
          <table:table-cell table:style-name="ce41" table:number-columns-repeated="5"/>
          <table:table-cell table:style-name="ce42"/>
          <table:table-cell table:style-name="ce67" table:number-columns-repeated="12"/>
          <table:table-cell table:number-columns-repeated="998"/>
        </table:table-row>
        <table:table-row table:style-name="ro17">
          <table:table-cell table:style-name="ce37"/>
          <table:table-cell table:style-name="ce40"/>
          <table:table-cell table:style-name="ce47" office:value-type="string" calcext:value-type="string">
            <text:p>Closed Bugs : 56</text:p>
          </table:table-cell>
          <table:table-cell table:style-name="ce46"/>
          <table:table-cell table:style-name="ce44"/>
          <table:table-cell table:style-name="ce46" table:number-columns-repeated="2"/>
          <table:table-cell table:style-name="ce44" table:number-columns-repeated="4"/>
          <table:table-cell table:style-name="ce61"/>
          <table:table-cell table:number-columns-repeated="1012"/>
        </table:table-row>
        <table:table-row table:style-name="ro18">
          <table:table-cell table:style-name="ce37"/>
          <table:table-cell table:style-name="ce40"/>
          <table:table-cell table:style-name="ce47" office:value-type="string" calcext:value-type="string">
            <text:p>New Bugs <text:s text:c="3"/>: 11</text:p>
          </table:table-cell>
          <table:table-cell table:style-name="ce46"/>
          <table:table-cell table:style-name="ce44"/>
          <table:table-cell table:style-name="ce46" table:number-columns-repeated="2"/>
          <table:table-cell table:style-name="ce57"/>
          <table:table-cell table:style-name="ce44" table:number-columns-repeated="3"/>
          <table:table-cell table:style-name="ce61"/>
          <table:table-cell table:number-columns-repeated="1012"/>
        </table:table-row>
        <table:table-row table:style-name="ro18">
          <table:table-cell table:style-name="ce37"/>
          <table:table-cell table:style-name="ce40"/>
          <table:table-cell table:style-name="ce45"/>
          <table:table-cell table:style-name="ce46" table:number-columns-repeated="4"/>
          <table:table-cell table:style-name="ce44" table:number-columns-repeated="4"/>
          <table:table-cell table:style-name="ce60"/>
          <table:table-cell/>
          <table:table-cell table:style-name="ce42"/>
          <table:table-cell table:style-name="ce67" table:number-columns-repeated="12"/>
          <table:table-cell table:number-columns-repeated="998"/>
        </table:table-row>
        <table:table-row table:style-name="ro2">
          <table:table-cell table:style-name="ce37"/>
          <table:table-cell table:style-name="ce40"/>
          <table:table-cell table:style-name="ce45"/>
          <table:table-cell table:style-name="ce46" table:number-columns-repeated="4"/>
          <table:table-cell table:style-name="ce44" table:number-columns-repeated="4"/>
          <table:table-cell table:style-name="ce60"/>
          <table:table-cell/>
          <table:table-cell table:style-name="ce42"/>
          <table:table-cell table:style-name="ce67" table:number-columns-repeated="12"/>
          <table:table-cell table:number-columns-repeated="998"/>
        </table:table-row>
        <table:table-row table:style-name="ro2">
          <table:table-cell table:style-name="ce37" table:number-columns-repeated="2"/>
          <table:table-cell table:style-name="ce48"/>
          <table:table-cell table:style-name="ce37" table:number-columns-repeated="5"/>
          <table:table-cell table:style-name="ce44" table:number-columns-repeated="3"/>
          <table:table-cell table:style-name="ce62"/>
          <table:table-cell table:number-columns-repeated="1012"/>
        </table:table-row>
        <table:table-row table:style-name="ro2">
          <table:table-cell table:style-name="ce37"/>
          <table:table-cell table:style-name="ce44"/>
          <table:table-cell table:style-name="ce46" table:number-columns-repeated="5"/>
          <table:table-cell table:style-name="ce57"/>
          <table:table-cell table:style-name="ce46"/>
          <table:table-cell table:style-name="ce44" table:number-columns-repeated="2"/>
          <table:table-cell table:style-name="ce61"/>
          <table:table-cell table:number-columns-repeated="1012"/>
        </table:table-row>
        <table:table-row table:style-name="ro2">
          <table:table-cell table:style-name="ce37"/>
          <table:table-cell table:style-name="ce44" table:number-columns-repeated="2"/>
          <table:table-cell table:style-name="ce46" table:number-columns-repeated="4"/>
          <table:table-cell table:style-name="ce57"/>
          <table:table-cell table:style-name="ce46"/>
          <table:table-cell table:style-name="ce44" table:number-columns-repeated="2"/>
          <table:table-cell table:style-name="ce61"/>
          <table:table-cell table:number-columns-repeated="1012"/>
        </table:table-row>
        <table:table-row table:style-name="ro2">
          <table:table-cell table:style-name="ce37"/>
          <table:table-cell table:style-name="ce44"/>
          <table:table-cell table:style-name="ce46" table:number-columns-repeated="2"/>
          <table:table-cell table:style-name="ce44"/>
          <table:table-cell table:style-name="ce46" table:number-columns-repeated="2"/>
          <table:table-cell table:style-name="ce57"/>
          <table:table-cell table:style-name="ce46"/>
          <table:table-cell table:style-name="ce44" table:number-columns-repeated="2"/>
          <table:table-cell table:style-name="ce61"/>
          <table:table-cell table:number-columns-repeated="1012"/>
        </table:table-row>
        <table:table-row table:style-name="ro2" table:number-rows-repeated="41">
          <table:table-cell table:style-name="ce37"/>
          <table:table-cell table:number-columns-repeated="1023"/>
        </table:table-row>
        <table:table-row table:style-name="ro2" table:number-rows-repeated="1048116">
          <table:table-cell table:number-columns-repeated="1024"/>
        </table:table-row>
        <table:table-row table:style-name="ro19" table:number-rows-repeated="4">
          <table:table-cell table:number-columns-repeated="1024"/>
        </table:table-row>
        <table:table-row table:style-name="ro20" table:number-rows-repeated="307">
          <table:table-cell table:style-name="ce39" table:number-columns-repeated="7"/>
          <table:table-cell table:style-name="ce58"/>
          <table:table-cell table:style-name="ce39" table:number-columns-repeated="1014"/>
          <table:table-cell table:number-columns-repeated="2"/>
        </table:table-row>
        <table:table-row table:style-name="ro19" table:number-rows-repeated="29">
          <table:table-cell table:style-name="ce39" table:number-columns-repeated="7"/>
          <table:table-cell table:style-name="ce58"/>
          <table:table-cell table:style-name="ce39" table:number-columns-repeated="1014"/>
          <table:table-cell table:number-columns-repeated="2"/>
        </table:table-row>
        <table:table-row table:style-name="ro19">
          <table:table-cell table:style-name="ce39" table:number-columns-repeated="7"/>
          <table:table-cell table:style-name="ce58"/>
          <table:table-cell table:style-name="ce39" table:number-columns-repeated="1014"/>
          <table:table-cell table:number-columns-repeated="2"/>
        </table:table-row>
      </table:table>
      <table:named-expressions/>
      <table:database-ranges>
        <table:database-range table:name="__Anonymous_Sheet_DB__0" table:target-range-address="'01-January-2025 To 22-April-2025'.A1:'01-January-2025 To 22-April-2025'.N6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Arial" svg:font-family="Arial" style:font-family-generic="swis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IN"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number:text>
      <number:fill-character> </number:fill-character>
      <number:number number:decimal-places="0" number:min-decimal-places="0" number:min-integer-digits="1" number:grouping="true"/>
      <number:text> </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ormal" style:display-name="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2">00/00/0000</text:date>, <text:time style:data-style-name="N2" text:time-value="11:12:07.7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21T16:34:36.353000000</meta:creation-date>
    <dc:date>2025-04-22T11:12:36.556000000</dc:date>
    <meta:editing-duration>PT1H8M27S</meta:editing-duration>
    <meta:editing-cycles>29</meta:editing-cycles>
    <meta:generator>LibreOffice/7.1.1.2$Windows_X86_64 LibreOffice_project/fe0b08f4af1bacafe4c7ecc87ce55bb426164676</meta:generator>
    <meta:document-statistic meta:table-count="1" meta:cell-count="955" meta:object-count="0"/>
  </office:meta>
</office:document-meta>
</file>